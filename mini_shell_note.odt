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0.583cm" fo:margin-top="0cm" fo:margin-bottom="0cm" table:align="center" style:writing-mode="page"/>
    </style:style>
    <style:style style:name="表格1.A" style:family="table-column">
      <style:table-column-properties style:column-width="10.583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459cm" fo:padding-right="0.459cm" fo:padding-top="0.388cm" fo:padding-bottom="0.388cm" fo:border="1pt solid #1f3a5f">
        <style:background-image/>
      </style:table-cell-properties>
    </style:style>
    <style:style style:name="表格2" style:family="table">
      <style:table-properties style:width="17.191cm" fo:margin-left="0.053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5.29cm"/>
    </style:style>
    <style:style style:name="表格3.B" style:family="table-column">
      <style:table-column-properties style:column-width="2.824cm"/>
    </style:style>
    <style:style style:name="表格3.C" style:family="table-column">
      <style:table-column-properties style:column-width="9.077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3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3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3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3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3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3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3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3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3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3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3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4" style:family="table">
      <style:table-properties style:width="17.191cm" fo:margin-left="0.053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6" style:family="table">
      <style:table-properties style:width="17.191cm" fo:margin-left="0.053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4.233cm"/>
    </style:style>
    <style:style style:name="表格7.B" style:family="table-column">
      <style:table-column-properties style:column-width="12.958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7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7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7.B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7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7.B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7.A4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7.B4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117cm"/>
    </style:style>
    <style:style style:name="表格8.C" style:family="table-column">
      <style:table-column-properties style:column-width="7.138cm"/>
    </style:style>
    <style:style style:name="表格8.D" style:family="table-column">
      <style:table-column-properties style:column-width="2.64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8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8.E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8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8.E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8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8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8.E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8.A9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8.B9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8.E9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9" style:family="table">
      <style:table-properties style:width="17.191cm" fo:margin-left="0.053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9.A2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4.233cm"/>
    </style:style>
    <style:style style:name="表格10.B" style:family="table-column">
      <style:table-column-properties style:column-width="12.958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212cm" fo:padding-right="0.212cm" fo:padding-top="0.176cm" fo:padding-bottom="0.176cm" fo:border="0.5pt solid #000000">
        <style:background-image/>
      </style:table-cell-properties>
    </style:style>
    <style:style style:name="表格10.A2" style:family="table-cell">
      <style:table-cell-properties style:vertical-align="middle" fo:background-color="#ffffff" fo:padding-left="0.212cm" fo:padding-right="0.212cm" fo:padding-top="0.159cm" fo:padding-bottom="0.159cm" fo:border="0.5pt solid #000000">
        <style:background-image/>
      </style:table-cell-properties>
    </style:style>
    <style:style style:name="表格10.A3" style:family="table-cell">
      <style:table-cell-properties style:vertical-align="middle" fo:background-color="#fbf1dd" fo:padding-left="0.212cm" fo:padding-right="0.212cm" fo:padding-top="0.159cm" fo:padding-bottom="0.159cm" fo:border="0.5pt solid #000000">
        <style:background-image/>
      </style:table-cell-properties>
    </style:style>
    <style:style style:name="表格10.A5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12" style:family="table">
      <style:table-properties style:width="17.191cm" fo:margin-left="0.053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12.A2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表格13" style:family="table">
      <style:table-properties style:width="17.191cm" fo:margin-left="0.053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3.526cm"/>
    </style:style>
    <style:style style:name="表格14.B" style:family="table-column">
      <style:table-column-properties style:column-width="13.665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14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14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4.B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4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4.B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4.A6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14.B6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17" style:family="table">
      <style:table-properties style:width="17.191cm" fo:margin-left="0.053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17.A2" style:family="table-cell">
      <style:table-cell-properties fo:background-color="#fbe7e5" fo:padding-left="0.353cm" fo:padding-right="0.353cm" fo:padding-top="0.247cm" fo:padding-bottom="0.247cm" fo:border-left="3pt solid #c0392b" fo:border-right="0.5pt solid #c0392b" fo:border-top="0.5pt solid #c0392b" fo:border-bottom="0.5pt solid #c0392b">
        <style:background-image/>
      </style:table-cell-properties>
    </style:style>
    <style:style style:name="表格17.A3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175cm"/>
    </style:style>
    <style:style style:name="表格18.B" style:family="table-column">
      <style:table-column-properties style:column-width="4.586cm"/>
    </style:style>
    <style:style style:name="表格18.C" style:family="table-column">
      <style:table-column-properties style:column-width="9.43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18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18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18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8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18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8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18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18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18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18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18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2b2b2b" fo:padding-left="0.388cm" fo:padding-right="0.388cm" fo:padding-top="0.282cm" fo:padding-bottom="0.282cm" fo:border="0.5pt solid #000000">
        <style:background-image/>
      </style:table-cell-properties>
    </style:style>
    <style:style style:name="表格20" style:family="table">
      <style:table-properties style:width="17.191cm" fo:margin-left="0.053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21" style:family="table">
      <style:table-properties style:width="17.191cm" fo:margin-left="0.053cm" fo:margin-top="0cm" fo:margin-bottom="0cm" table:align="left" style:writing-mode="page"/>
    </style:style>
    <style:style style:name="表格21.A" style:family="table-column">
      <style:table-column-properties style:column-width="17.19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ff3d6" fo:padding-left="0.353cm" fo:padding-right="0.353cm" fo:padding-top="0.247cm" fo:padding-bottom="0.247cm" fo:border-left="3pt solid #d9760a" fo:border-right="0.5pt solid #d9760a" fo:border-top="0.5pt solid #d9760a" fo:border-bottom="0.5pt solid #d9760a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1.762cm"/>
    </style:style>
    <style:style style:name="表格22.B" style:family="table-column">
      <style:table-column-properties style:column-width="5.644cm"/>
    </style:style>
    <style:style style:name="表格22.C" style:family="table-column">
      <style:table-column-properties style:column-width="9.78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212cm" fo:padding-right="0.212cm" fo:padding-top="0.176cm" fo:padding-bottom="0.176cm" fo:border-left="0.5pt solid #cccccc" fo:border-right="0.25pt solid #dddddd" fo:border-top="0.5pt solid #cccccc" fo:border-bottom="0.25pt solid #dddddd">
        <style:background-image/>
      </style:table-cell-properties>
    </style:style>
    <style:style style:name="表格22.B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25pt solid #dddddd" fo:border-top="0.5pt solid #cccccc" fo:border-bottom="0.25pt solid #dddddd">
        <style:background-image/>
      </style:table-cell-properties>
    </style:style>
    <style:style style:name="表格22.C1" style:family="table-cell">
      <style:table-cell-properties style:vertical-align="middle" fo:background-color="#1f3a5f" fo:padding-left="0.212cm" fo:padding-right="0.212cm" fo:padding-top="0.176cm" fo:padding-bottom="0.176cm" fo:border-left="0.25pt solid #dddddd" fo:border-right="0.5pt solid #cccccc" fo:border-top="0.5pt solid #cccccc" fo:border-bottom="0.25pt solid #dddddd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22.B2" style:family="table-cell">
      <style:table-cell-properties style:vertical-align="middle" fo:background-color="#ffffff" fo:padding-left="0.212cm" fo:padding-right="0.212cm" fo:padding-top="0.159cm" fo:padding-bottom="0.159cm" fo:border="0.25pt solid #dddddd">
        <style:background-image/>
      </style:table-cell-properties>
    </style:style>
    <style:style style:name="表格22.C2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22.A3" style:family="table-cell">
      <style:table-cell-properties style:vertical-align="middle" fo:background-color="#fbf1dd" fo:padding-left="0.212cm" fo:padding-right="0.212cm" fo:padding-top="0.159cm" fo:padding-bottom="0.159cm" fo:border-left="0.5pt solid #cccccc" fo:border-right="0.25pt solid #dddddd" fo:border-top="0.25pt solid #dddddd" fo:border-bottom="0.25pt solid #dddddd">
        <style:background-image/>
      </style:table-cell-properties>
    </style:style>
    <style:style style:name="表格22.B3" style:family="table-cell">
      <style:table-cell-properties style:vertical-align="middle" fo:background-color="#fbf1dd" fo:padding-left="0.212cm" fo:padding-right="0.212cm" fo:padding-top="0.159cm" fo:padding-bottom="0.159cm" fo:border="0.25pt solid #dddddd">
        <style:background-image/>
      </style:table-cell-properties>
    </style:style>
    <style:style style:name="表格22.C3" style:family="table-cell">
      <style:table-cell-properties style:vertical-align="middle" fo:background-color="#fbf1dd" fo:padding-left="0.212cm" fo:padding-right="0.212cm" fo:padding-top="0.159cm" fo:padding-bottom="0.159cm" fo:border-left="0.25pt solid #dddddd" fo:border-right="0.5pt solid #cccccc" fo:border-top="0.25pt solid #dddddd" fo:border-bottom="0.25pt solid #dddddd">
        <style:background-image/>
      </style:table-cell-properties>
    </style:style>
    <style:style style:name="表格22.A8" style:family="table-cell">
      <style:table-cell-properties style:vertical-align="middle" fo:background-color="#ffffff" fo:padding-left="0.212cm" fo:padding-right="0.212cm" fo:padding-top="0.159cm" fo:padding-bottom="0.159cm" fo:border-left="0.5pt solid #cccccc" fo:border-right="0.25pt solid #dddddd" fo:border-top="0.25pt solid #dddddd" fo:border-bottom="0.5pt solid #cccccc">
        <style:background-image/>
      </style:table-cell-properties>
    </style:style>
    <style:style style:name="表格22.B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25pt solid #dddddd" fo:border-top="0.25pt solid #dddddd" fo:border-bottom="0.5pt solid #cccccc">
        <style:background-image/>
      </style:table-cell-properties>
    </style:style>
    <style:style style:name="表格22.C8" style:family="table-cell">
      <style:table-cell-properties style:vertical-align="middle" fo:background-color="#ffffff" fo:padding-left="0.212cm" fo:padding-right="0.212cm" fo:padding-top="0.159cm" fo:padding-bottom="0.159cm" fo:border-left="0.25pt solid #dddddd" fo:border-right="0.5pt solid #cccccc" fo:border-top="0.25pt solid #dddddd" fo:border-bottom="0.5pt solid #cccccc">
        <style:background-image/>
      </style:table-cell-properties>
    </style:style>
    <style:style style:name="表格23" style:family="table">
      <style:table-properties style:width="17.191cm" fo:margin-left="0.053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7f5ea" fo:padding-left="0.353cm" fo:padding-right="0.353cm" fo:padding-top="0.247cm" fo:padding-bottom="0.247cm" fo:border-left="3pt solid #3c8a4c" fo:border-right="0.5pt solid #3c8a4c" fo:border-top="0.5pt solid #3c8a4c" fo:border-bottom="0.5pt solid #3c8a4c">
        <style:background-image/>
      </style:table-cell-properties>
    </style:style>
    <style:style style:name="表格24" style:family="table">
      <style:table-properties style:width="17.191cm" fo:margin-left="0.009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fefef" fo:padding-left="0.459cm" fo:padding-right="0.459cm" fo:padding-top="0.282cm" fo:padding-bottom="0.282cm" fo:border="0.5pt solid #bbbbbb">
        <style:background-image/>
      </style:table-cell-properties>
    </style:style>
    <style:style style:name="表格25" style:family="table">
      <style:table-properties style:width="17.191cm" fo:margin-left="0.053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e8f1fb" fo:padding-left="0.353cm" fo:padding-right="0.353cm" fo:padding-top="0.247cm" fo:padding-bottom="0.247cm" fo:border-left="3pt solid #2e6da4" fo:border-right="0.5pt solid #2e6da4" fo:border-top="0.5pt solid #2e6da4" fo:border-bottom="0.5pt solid #2e6da4">
        <style:background-image/>
      </style:table-cell-properties>
    </style:style>
    <style:style style:name="P1" style:family="paragraph" style:parent-style-name="Standard">
      <style:paragraph-properties fo:margin-top="2.469cm" fo:margin-bottom="0cm" style:contextual-spacing="false"/>
    </style:style>
    <style:style style:name="P2" style:family="paragraph" style:parent-style-name="Standard">
      <style:paragraph-properties fo:text-align="center" style:justify-single-word="false"/>
      <style:text-properties fo:color="#d9760a" loext:opacity="100%" style:font-name="Microsoft JhengHei" fo:font-size="13pt" fo:font-weight="bold" style:font-name-asian="Microsoft JhengHei1" style:font-size-asian="13pt" style:font-weight-asian="bold" style:font-name-complex="Microsoft JhengHei1" style:font-size-complex="13pt" style:font-weight-complex="bold"/>
    </style:style>
    <style:style style:name="P3" style:family="paragraph" style:parent-style-name="Standard">
      <style:paragraph-properties fo:margin-top="0.353cm" fo:margin-bottom="0.353cm" style:contextual-spacing="false" fo:text-align="center" style:justify-single-word="false"/>
      <style:text-properties fo:color="#1f3a5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4" style:family="paragraph" style:parent-style-name="Standard">
      <style:paragraph-properties fo:margin-top="0cm" fo:margin-bottom="1.235cm" style:contextual-spacing="false" fo:text-align="center" style:justify-single-word="false"/>
      <style:text-properties fo:color="#2e6da4" loext:opacity="100%" style:font-name="Microsoft JhengHei" fo:font-size="12pt" style:font-name-asian="Microsoft JhengHei1" style:font-size-asian="12pt" style:font-name-complex="Microsoft JhengHei1" style:font-size-complex="12pt"/>
    </style:style>
    <style:style style:name="P5" style:family="paragraph" style:parent-style-name="Standard">
      <style:paragraph-properties fo:margin-top="0cm" fo:margin-bottom="0.141cm" style:contextual-spacing="false" fo:text-align="center" style:justify-single-word="false"/>
      <style:text-properties fo:color="#1f3a5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6" style:family="paragraph" style:parent-style-name="Standard">
      <style:paragraph-properties fo:margin-top="0cm" fo:margin-bottom="0.053cm" style:contextual-spacing="false" fo:text-align="center" style:justify-single-word="false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7" style:family="paragraph" style:parent-style-name="Standard">
      <style:paragraph-properties fo:text-align="center" style:justify-single-word="false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margin-top="0.67cm" fo:margin-bottom="0.353cm" style:contextual-spacing="false" fo:padding-left="0cm" fo:padding-right="0cm" fo:padding-top="0cm" fo:padding-bottom="0.212cm" fo:border-left="none" fo:border-right="none" fo:border-top="none" fo:border-bottom="1.5pt solid #1f3a5f"/>
      <style:text-properties fo:color="#1f3a5f" loext:opacity="100%" style:font-name="Microsoft JhengHei" fo:font-size="16pt" fo:font-weight="bold" style:font-name-asian="Microsoft JhengHei1" style:font-size-asian="16pt" style:font-weight-asian="bold" style:font-name-complex="Microsoft JhengHei1" style:font-size-complex="16pt" style:font-weight-complex="bold"/>
    </style:style>
    <style:style style:name="P10" style:family="paragraph" style:parent-style-name="Standard">
      <style:paragraph-properties fo:margin-top="0cm" fo:margin-bottom="0.247cm" style:contextual-spacing="false" fo:line-height="125%"/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List_20_Paragraph" style:list-style-name="WWNum2">
      <style:paragraph-properties fo:margin-top="0cm" fo:margin-bottom="0.159cm" style:contextual-spacing="false" fo:line-height="125%"/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paragraph-properties fo:margin-top="0cm" fo:margin-bottom="0.212cm" style:contextual-spacing="false"/>
    </style:style>
    <style:style style:name="P13" style:family="paragraph" style:parent-style-name="Standard">
      <style:paragraph-properties fo:margin-top="0cm" fo:margin-bottom="0.141cm" style:contextual-spacing="false"/>
      <style:text-properties fo:color="#1e5b2a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14" style:family="paragraph" style:parent-style-name="Standard">
      <style:paragraph-properties fo:margin-top="0cm" fo:margin-bottom="0.106cm" style:contextual-spacing="false" fo:line-height="121%"/>
      <style:text-properties fo:color="#444444" loext:opacity="100%" style:font-name="Microsoft JhengHei" fo:font-size="10pt" style:font-name-asian="Microsoft JhengHei1" style:font-size-asian="10pt" style:font-name-complex="Microsoft JhengHei1" style:font-size-complex="10pt"/>
    </style:style>
    <style:style style:name="P15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6" style:family="paragraph" style:parent-style-name="Standard">
      <style:paragraph-properties fo:line-height="113%"/>
      <style:text-properties fo:color="#444444" loext:opacity="100%" style:font-name="Microsoft JhengHei" fo:font-size="9.5pt" style:font-name-asian="Microsoft JhengHei1" style:font-size-asian="9.5pt" style:font-name-complex="Microsoft JhengHei1" style:font-size-complex="9.5pt"/>
    </style:style>
    <style:style style:name="P17" style:family="paragraph" style:parent-style-name="Standard">
      <style:paragraph-properties fo:margin-top="0cm" fo:margin-bottom="0.141cm" style:contextual-spacing="false"/>
      <style:text-properties fo:color="#8a530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18" style:family="paragraph" style:parent-style-name="Standard">
      <style:paragraph-properties fo:margin-top="0cm" fo:margin-bottom="0.388cm" style:contextual-spacing="false"/>
    </style:style>
    <style:style style:name="P19" style:family="paragraph" style:parent-style-name="Standard">
      <style:paragraph-properties fo:margin-top="0cm" fo:margin-bottom="0cm" style:contextual-spacing="false" fo:line-height="109%"/>
      <style:text-properties fo:color="#333333" loext:opacity="100%" style:font-name="Consolas" fo:font-size="9.5pt" style:font-name-asian="Consolas1" style:font-size-asian="9.5pt" style:font-name-complex="Consolas1" style:font-size-complex="9.5pt"/>
    </style:style>
    <style:style style:name="P20" style:family="paragraph" style:parent-style-name="Standard">
      <style:paragraph-properties fo:margin-top="0.353cm" fo:margin-bottom="0.176cm" style:contextual-spacing="false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1f3a5f" loext:opacity="100%" style:font-name="Microsoft JhengHei" fo:font-size="10pt" fo:font-weight="bold" fo:background-color="#fbf1dd" style:font-name-asian="Microsoft JhengHei1" style:font-size-asian="10pt" style:font-weight-asian="bold" style:font-name-complex="Microsoft JhengHei1" style:font-size-complex="10pt" style:font-weight-complex="bold"/>
    </style:style>
    <style:style style:name="P22" style:family="paragraph" style:parent-style-name="Standard">
      <style:paragraph-properties fo:margin-top="0cm" fo:margin-bottom="0.071cm" style:contextual-spacing="false" fo:text-align="center" style:justify-single-word="fals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3" style:family="paragraph" style:parent-style-name="Standard">
      <style:paragraph-properties fo:margin-top="0.353cm" fo:margin-bottom="0.176cm" style:contextual-spacing="fals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4" style:family="paragraph" style:parent-style-name="Standard">
      <style:paragraph-properties fo:margin-top="0cm" fo:margin-bottom="0.247cm" style:contextual-spacing="false" fo:line-height="125%"/>
    </style:style>
    <style:style style:name="P25" style:family="paragraph" style:parent-style-name="Standard">
      <style:paragraph-properties fo:margin-top="0cm" fo:margin-bottom="0.141cm" style:contextual-spacing="false"/>
    </style:style>
    <style:style style:name="P26" style:family="paragraph" style:parent-style-name="Standard">
      <style:paragraph-properties fo:margin-top="0cm" fo:margin-bottom="0cm" style:contextual-spacing="false" fo:line-height="109%"/>
    </style:style>
    <style:style style:name="P27" style:family="paragraph" style:parent-style-name="Standard">
      <style:paragraph-properties fo:margin-top="0cm" fo:margin-bottom="0.141cm" style:contextual-spacing="false"/>
      <style:text-properties fo:color="#1f4e79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28" style:family="paragraph" style:parent-style-name="Standard">
      <style:paragraph-properties fo:margin-top="0cm" fo:margin-bottom="0.106cm" style:contextual-spacing="false" fo:line-height="121%"/>
    </style:style>
    <style:style style:name="P29" style:family="paragraph" style:parent-style-name="List_20_Paragraph" style:list-style-name="WWNum2">
      <style:paragraph-properties fo:margin-top="0cm" fo:margin-bottom="0.159cm" style:contextual-spacing="false" fo:line-height="125%"/>
    </style:style>
    <style:style style:name="P30" style:family="paragraph" style:parent-style-name="Standard">
      <style:paragraph-properties fo:margin-top="0cm" fo:margin-bottom="0.141cm" style:contextual-spacing="false"/>
      <style:text-properties fo:color="#8e2a2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31" style:family="paragraph" style:parent-style-name="Heading_20_1">
      <style:paragraph-properties fo:margin-top="0.67cm" fo:margin-bottom="0.353cm" style:contextual-spacing="false" fo:padding-left="0cm" fo:padding-right="0cm" fo:padding-top="0cm" fo:padding-bottom="0.212cm" fo:border-left="none" fo:border-right="none" fo:border-top="none" fo:border-bottom="1.5pt solid #1f3a5f"/>
    </style:style>
    <style:style style:name="P32" style:family="paragraph" style:parent-style-name="Standard">
      <style:paragraph-properties fo:margin-top="0cm" fo:margin-bottom="0cm" style:contextual-spacing="false" fo:line-height="109%"/>
      <style:text-properties fo:color="#7fb3e0" loext:opacity="100%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fo:color="#d9760a" loext:opacity="100%" style:font-name="Microsoft JhengHei" fo:font-size="9.5pt" fo:font-weight="bold" style:font-name-asian="Microsoft JhengHei1" style:font-size-asian="9.5pt" style:font-weight-asian="bold" style:font-name-complex="Microsoft JhengHei1" style:font-size-complex="9.5pt" style:font-weight-complex="bold"/>
    </style:style>
    <style:style style:name="T2" style:family="text">
      <style:text-properties fo:color="#6b6b6b" loext:opacity="100%" style:font-name="Microsoft JhengHei" fo:font-size="9.5pt" fo:font-style="italic" style:font-name-asian="Microsoft JhengHei1" style:font-size-asian="9.5pt" style:font-style-asian="italic" style:font-name-complex="Microsoft JhengHei1" style:font-size-complex="9.5pt" style:font-style-complex="italic"/>
    </style:style>
    <style:style style:name="T3" style:family="text"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T4" style:family="text">
      <style:text-properties fo:color="#444444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5" style:family="text">
      <style:text-properties fo:color="#8a5300" loext:opacity="100%"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T6" style:family="text">
      <style:text-properties fo:color="#7fb3e0" loext:opacity="100%"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color="#f0f0f0" loext:opacity="100%" style:font-name="Consolas" fo:font-size="9.5pt" style:font-name-asian="Consolas1" style:font-size-asian="9.5pt" style:font-name-complex="Consolas1" style:font-size-complex="9.5pt"/>
    </style:style>
    <style:style style:name="T8" style:family="text">
      <style:text-properties fo:color="#444444" loext:opacity="100%" style:font-name="Microsoft JhengHei" fo:font-size="10pt" style:font-name-asian="Microsoft JhengHei1" style:font-size-asian="10pt" style:font-name-complex="Microsoft JhengHei1" style:font-size-complex="10pt"/>
    </style:style>
    <style:style style:name="T9" style:family="text">
      <style:text-properties fo:color="#1f3a5f" loext:opacity="100%" style:font-name="Microsoft JhengHei" fo:font-size="16pt" fo:font-weight="bold" style:font-name-asian="Microsoft JhengHei1" style:font-size-asian="16pt" style:font-weight-asian="bold" style:font-name-complex="Microsoft JhengHei1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nux Backend 學習筆記</text:p>
      <text:p text:style-name="P3">從零開始讀懂一份 Mini Shell 原始碼</text:p>
      <text:p text:style-name="P4">fork・exec・pipe・termios　完整拆解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本筆記涵蓋</text:p>
            <text:p text:style-name="P6">程式整體架構　│　命令解析器　│　外部指令執行</text:p>
            <text:p text:style-name="P6">內建指令　│　管道 Pipe　│　終端機游標控制</text:p>
            <text:p text:style-name="P7">歷史紀錄　│　自學路線建議</text:p>
          </table:table-cell>
        </table:table-row>
      </table:table>
      <text:p text:style-name="P8"/>
      <text:p text:style-name="P9">前言：這份程式在做什麼？</text:p>
      <text:p text:style-name="P10">這份程式是一個「迷你版的 Shell」，也就是一個簡化過的終端機命令列程式，功能對應到 Linux 上大家每天在用的 bash。它大約 500 多行，卻已經包含了一個真正 Shell 需要的核心元件：</text:p>
      <text:list text:style-name="WWNum2">
        <text:list-item text:start-value="1">
          <text:p text:style-name="P11">提示字元（prompt）：像 user@host ~ $ 這樣的畫面</text:p>
        </text:list-item>
        <text:list-item>
          <text:p text:style-name="P11">內建指令：cd、pwd、history、env、exit</text:p>
        </text:list-item>
        <text:list-item>
          <text:p text:style-name="P11">外部程式執行：透過 fork + exec 呼叫系統上的程式</text:p>
        </text:list-item>
        <text:list-item>
          <text:p text:style-name="P11">管道 Pipe：讓 ls | grep xxx 這種語法可以運作</text:p>
        </text:list-item>
        <text:list-item>
          <text:p text:style-name="P11">命令解析器（Parser）：把一整行文字拆成一個個指令</text:p>
        </text:list-item>
        <text:list-item>
          <text:p text:style-name="P11">歷史紀錄：上下方向鍵可以叫出之前打過的指令</text:p>
        </text:list-item>
        <text:list-item>
          <text:p text:style-name="P11">終端機控制：Backspace、方向鍵、Ctrl+A、Ctrl+U 等按鍵行為</text:p>
        </text:list-item>
      </text:list>
      <text:p text:style-name="P1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3">✅ 結論 / 口訣</text:p>
            <text:p text:style-name="P14">這份程式的價值不在「程式碼多長」，而在於它把 Linux Backend 最核心的三件事——行程（process）、系統呼叫（system call）、檔案描述符（file descriptor）——全部串在一起，用一個看得到、跑得動的小專案示範出來。學完它，你會對「作業系統」不再只是課本上的名詞。</text:p>
          </table:table-cell>
        </table:table-row>
      </table:table>
      <text:p text:style-name="P9">模組地圖：先看全貌，再逐一擊破</text:p>
      <text:p text:style-name="P10">這份程式雖然將近 500 行，但攤開來看，其實只由 7 個模組組成。下表把每個模組對應到「大約在原始碼的第幾行」，之後每一章開頭也會標出對照的行號區間——邊讀筆記、邊對照原始碼，會比只看文字說明更有感。</text:p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15">模組</text:p>
            </table:table-cell>
            <table:table-cell table:style-name="表格3.B1" office:value-type="string">
              <text:p text:style-name="P15">約略行號</text:p>
            </table:table-cell>
            <table:table-cell table:style-name="表格3.C1" office:value-type="string">
              <text:p text:style-name="P15">一句話：它負責什麼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6">main()</text:p>
          </table:table-cell>
          <table:table-cell table:style-name="表格3.B2" office:value-type="string">
            <text:p text:style-name="P16">487 ~ 499</text:p>
          </table:table-cell>
          <table:table-cell table:style-name="表格3.C2" office:value-type="string">
            <text:p text:style-name="P16">整支程式的主迴圈：印提示字元、讀輸入、解析、執行，不斷重複</text:p>
          </table:table-cell>
        </table:table-row>
        <table:table-row table:style-name="表格3.1">
          <table:table-cell table:style-name="表格3.A3" office:value-type="string">
            <text:p text:style-name="P16">parser（含 parserToken／parserCmd）</text:p>
          </table:table-cell>
          <table:table-cell table:style-name="表格3.B3" office:value-type="string">
            <text:p text:style-name="P16">124 ~ 199</text:p>
          </table:table-cell>
          <table:table-cell table:style-name="表格3.C3" office:value-type="string">
            <text:p text:style-name="P16">把使用者打的一整行字，拆成單字，再依 | 分組成多個指令</text:p>
          </table:table-cell>
        </table:table-row>
        <text:soft-page-break/>
        <table:table-row table:style-name="表格3.1">
          <table:table-cell table:style-name="表格3.A2" office:value-type="string">
            <text:p text:style-name="P16">exec（execSingleCmd／execExternalCmd）</text:p>
          </table:table-cell>
          <table:table-cell table:style-name="表格3.B2" office:value-type="string">
            <text:p text:style-name="P16">214 ~ 248</text:p>
          </table:table-cell>
          <table:table-cell table:style-name="表格3.C2" office:value-type="string">
            <text:p text:style-name="P16">判斷是內建指令還是外部指令，外部指令用 fork + exec + wait 執行</text:p>
          </table:table-cell>
        </table:table-row>
        <table:table-row table:style-name="表格3.1">
          <table:table-cell table:style-name="表格3.A3" office:value-type="string">
            <text:p text:style-name="P16">builtin（cd／pwd／history／env）</text:p>
          </table:table-cell>
          <table:table-cell table:style-name="表格3.B3" office:value-type="string">
            <text:p text:style-name="P16">68 ~ 105</text:p>
          </table:table-cell>
          <table:table-cell table:style-name="表格3.C3" office:value-type="string">
            <text:p text:style-name="P16">Shell 自己親自處理、不需要 fork 的指令</text:p>
          </table:table-cell>
        </table:table-row>
        <table:table-row table:style-name="表格3.1">
          <table:table-cell table:style-name="表格3.A2" office:value-type="string">
            <text:p text:style-name="P16">pipe（myPipe／execPipeCmd）</text:p>
          </table:table-cell>
          <table:table-cell table:style-name="表格3.B2" office:value-type="string">
            <text:p text:style-name="P16">249 ~ 303</text:p>
          </table:table-cell>
          <table:table-cell table:style-name="表格3.C2" office:value-type="string">
            <text:p text:style-name="P16">用 dup2 把上一個指令的輸出接到下一個指令的輸入</text:p>
          </table:table-cell>
        </table:table-row>
        <table:table-row table:style-name="表格3.1">
          <table:table-cell table:style-name="表格3.A3" office:value-type="string">
            <text:p text:style-name="P16">terminal（backSpace／cursor／getCmdLine）</text:p>
          </table:table-cell>
          <table:table-cell table:style-name="表格3.B3" office:value-type="string">
            <text:p text:style-name="P16">313 ~ 486</text:p>
          </table:table-cell>
          <table:table-cell table:style-name="表格3.C3" office:value-type="string">
            <text:p text:style-name="P16">關閉終端機預設模式，自己處理鍵盤按鍵與游標移動</text:p>
          </table:table-cell>
        </table:table-row>
        <table:table-row table:style-name="表格3.1">
          <table:table-cell table:style-name="表格3.A8" office:value-type="string">
            <text:p text:style-name="P16">history（setHistory／showPreCmd／showNextCmd）</text:p>
          </table:table-cell>
          <table:table-cell table:style-name="表格3.B8" office:value-type="string">
            <text:p text:style-name="P16">187 ~ 199、408 ~ 429</text:p>
          </table:table-cell>
          <table:table-cell table:style-name="表格3.C8" office:value-type="string">
            <text:p text:style-name="P16">記錄執行過的指令，並支援上下鍵叫出歷史</text:p>
          </table:table-cell>
        </table:table-row>
      </table:table>
      <text:p text:style-name="P12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7">⭐ 重點筆記：怎麼用這張表</text:p>
            <text:p text:style-name="P14">第一次讀，不用照順序從第 1 行讀到第 499 行。建議照表格由上到下的順序，一次只研究一個模組——讀完筆記的那一章，就翻開原始碼、對照該模組的行號實際看一遍，看完再進下一個模組。</text:p>
          </table:table-cell>
        </table:table-row>
      </table:table>
      <text:p text:style-name="P9">第一章：先看整體架構——只看 main()</text:p>
      <text:p text:style-name="P18"><text:span text:style-name="T1">📍 對照原始碼：</text:span><text:span text:style-name="T2">main()，約第 487 ~ 499 行</text:span></text:p>
      <text:p text:style-name="P10">第一次看這份程式，千萬不要從第 1 行往下硬讀。先只看 main() 函式，你會發現整個 Shell 其實只在做一件事：不斷重複「印提示字元 → 讀輸入 → 記錄歷史 → 解析 → 執行」這個循環。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int main() {</text:p>
            <text:p text:style-name="P19"><text:s text:c="2"/>initEnvs(); <text:s text:c="9"/>// 初始化環境變數、設定終端機模式</text:p>
            <text:p text:style-name="P19"><text:s/></text:p>
            <text:p text:style-name="P19"><text:s text:c="2"/>while (true) {</text:p>
            <text:p text:style-name="P19"><text:s text:c="4"/>printCmdLinePrefix(); <text:s text:c="2"/>// 印出 user@host ~ $</text:p>
            <text:p text:style-name="P19"><text:s text:c="4"/>getCmdLine(cmdLine); <text:s text:c="3"/>// 讀使用者一行一行打的字</text:p>
            <text:p text:style-name="P19"><text:s text:c="4"/>setHistory(cmdLine); <text:s text:c="3"/>// 把這行指令記進歷史清單</text:p>
            <text:p text:style-name="P19"><text:s text:c="4"/>parser(cmdLine, cmd); <text:s text:c="2"/>// 把字串拆成指令陣列</text:p>
            <text:p text:style-name="P19"><text:s text:c="4"/>execCmd(cmd); <text:s text:c="10"/>// 執行指令</text:p>
            <text:p text:style-name="P19"><text:s text:c="2"/>}</text:p>
            <text:p text:style-name="P19">}</text:p>
          </table:table-cell>
        </table:table-row>
      </table:table>
      <text:p text:style-name="P12"/>
      <text:p text:style-name="P20"><text:span text:style-name="T3">流程圖</text:span></text:p>
      <text:p text:style-name="P21"><text:soft-page-break/><text:s text:c="2"/>程式啟動，初始化環境 <text:s/></text:p>
      <text:p text:style-name="P22">↓</text:p>
      <text:p text:style-name="P21"><text:s text:c="2"/>印出提示字元 user@host $ <text:s/></text:p>
      <text:p text:style-name="P22">↓</text:p>
      <text:p text:style-name="P21"><text:s text:c="2"/>讀取使用者輸入的一行文字 <text:s/></text:p>
      <text:p text:style-name="P22">↓</text:p>
      <text:p text:style-name="P21"><text:s text:c="2"/>把這行加入歷史紀錄 <text:s/></text:p>
      <text:p text:style-name="P22">↓</text:p>
      <text:p text:style-name="P21"><text:s text:c="2"/>解析：拆成一個或多個指令 <text:s/></text:p>
      <text:p text:style-name="P22">↓</text:p>
      <text:p text:style-name="P21"><text:s text:c="2"/>執行指令 <text:s/></text:p>
      <text:p text:style-name="P22">↓</text:p>
      <text:p text:style-name="P21"><text:s text:c="2"/>回到「印提示字元」，無限循環 <text:s/></text:p>
      <text:p text:style-name="P12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7">⭐ 重點筆記：只要看懂這張圖，就已經懂了這份程式 30%</text:p>
            <text:p text:style-name="P14">後面所有章節，其實都只是在放大這張圖裡的某一個框框，講清楚它內部到底怎麼做而已。帶著這張圖去讀任何一段程式碼，你都不會迷路。</text:p>
          </table:table-cell>
        </table:table-row>
      </table:table>
      <text:p text:style-name="P9">第二章：命令解析器（Parser）</text:p>
      <text:p text:style-name="P18"><text:span text:style-name="T1">📍 對照原始碼：</text:span><text:span text:style-name="T2">parserToken() 約第 124 ~ 171 行、parserCmd() 約第 172 ~ 186 行</text:span></text:p>
      <text:p text:style-name="P10">使用者打的是一整行文字，例如 ls -l | grep cpp。電腦沒辦法直接「執行一句話」，所以第一步一定是把這句話拆解成電腦看得懂的一塊一塊資料。這件事分成兩層：先拆成「單字（token）」，再依照管道符號 | 把單字群組成一個個指令。</text:p>
      <text:p text:style-name="P23">第一層：parserToken()——拆成一個一個單字</text:p>
      <text:p text:style-name="P10">這個函式用了一個「有限狀態機」（finite state machine）來逐字掃描整行輸入，狀態只有三種：INIT（還沒開始一個單字）、WORD（正在讀一個單字）、PIPE（正在讀管道符號）。遇到空白就把目前累積的單字收進 tokens 清單，遇到 | 就單獨當成一個 token。</text:p>
      <text:p text:style-name="P23">第二層：parserCmd()——依 | 分組</text:p>
      <text:p text:style-name="P24"><text:span text:style-name="T4">拿到 token 清單後，再依照 | 把它們分組，變成「指令的指令清單」（vector&lt;vector&lt;string&gt;&gt;）。下面用實際例子走一次：</text:span></text:p>
      <table:table table:name="表格7" table:style-name="表格7">
        <table:table-column table:style-name="表格7.A"/>
        <table:table-column table:style-name="表格7.B"/>
        <table:table-header-rows>
          <text:soft-page-break/>
          <table:table-row table:style-name="表格7.1">
            <table:table-cell table:style-name="表格7.A1" office:value-type="string">
              <text:p text:style-name="P15">階段</text:p>
            </table:table-cell>
            <table:table-cell table:style-name="表格7.B1" office:value-type="string">
              <text:p text:style-name="P15">內容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6">原始輸入</text:p>
          </table:table-cell>
          <table:table-cell table:style-name="表格7.B2" office:value-type="string">
            <text:p text:style-name="P16">ls -l | grep cpp</text:p>
          </table:table-cell>
        </table:table-row>
        <table:table-row table:style-name="表格7.1">
          <table:table-cell table:style-name="表格7.A3" office:value-type="string">
            <text:p text:style-name="P16">Token 化後</text:p>
          </table:table-cell>
          <table:table-cell table:style-name="表格7.B3" office:value-type="string">
            <text:p text:style-name="P16">["ls"] <text:s/>["-l"] <text:s/>["|"] <text:s/>["grep"] <text:s/>["cpp"]</text:p>
          </table:table-cell>
        </table:table-row>
        <table:table-row table:style-name="表格7.1">
          <table:table-cell table:style-name="表格7.A4" office:value-type="string">
            <text:p text:style-name="P16">依 | 分組後</text:p>
          </table:table-cell>
          <table:table-cell table:style-name="表格7.B4" office:value-type="string">
            <text:p text:style-name="P16">[ ["ls", "-l"], <text:s/>["grep", "cpp"] ]</text:p>
          </table:table-cell>
        </table:table-row>
      </table:table>
      <text:p text:style-name="P12"/>
      <text:p text:style-name="P23">實際對照原始碼：一個字元、一個字元走一次 parserToken()</text:p>
      <text:p text:style-name="P10">光看轉換後的結果還不夠，真正卡住新手的地方，往往是「程式到底怎麼一步一步變出這個結果」。下面用 ls | grep 這個輸入，把 for (const auto &amp;c : cmdLine) 這個迴圈，一個字元一個字元地走一遍，對照的就是第 124 ~ 171 行那段 if (status == INIT) / else if (status == PIPE) / else 的邏輯：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15">讀到的字元</text:p>
            </table:table-cell>
            <table:table-cell table:style-name="表格8.B1" office:value-type="string">
              <text:p text:style-name="P15">目前狀態</text:p>
            </table:table-cell>
            <table:table-cell table:style-name="表格8.B1" office:value-type="string">
              <text:p text:style-name="P15">程式做的事</text:p>
            </table:table-cell>
            <table:table-cell table:style-name="表格8.B1" office:value-type="string">
              <text:p text:style-name="P15">token 目前內容</text:p>
            </table:table-cell>
            <table:table-cell table:style-name="表格8.E1" office:value-type="string">
              <text:p text:style-name="P15">tokens 清單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6">l</text:p>
          </table:table-cell>
          <table:table-cell table:style-name="表格8.B2" office:value-type="string">
            <text:p text:style-name="P16">INIT</text:p>
          </table:table-cell>
          <table:table-cell table:style-name="表格8.B2" office:value-type="string">
            <text:p text:style-name="P16">不是空白、不是 |，狀態變成 WORD，把 l 加進 token</text:p>
          </table:table-cell>
          <table:table-cell table:style-name="表格8.B2" office:value-type="string">
            <text:p text:style-name="P16">"l"</text:p>
          </table:table-cell>
          <table:table-cell table:style-name="表格8.E2" office:value-type="string">
            <text:p text:style-name="P16">[]</text:p>
          </table:table-cell>
        </table:table-row>
        <table:table-row table:style-name="表格8.1">
          <table:table-cell table:style-name="表格8.A3" office:value-type="string">
            <text:p text:style-name="P16">s</text:p>
          </table:table-cell>
          <table:table-cell table:style-name="表格8.B3" office:value-type="string">
            <text:p text:style-name="P16">WORD</text:p>
          </table:table-cell>
          <table:table-cell table:style-name="表格8.B3" office:value-type="string">
            <text:p text:style-name="P16">還是一般字元，繼續把 s 加進 token</text:p>
          </table:table-cell>
          <table:table-cell table:style-name="表格8.B3" office:value-type="string">
            <text:p text:style-name="P16">"ls"</text:p>
          </table:table-cell>
          <table:table-cell table:style-name="表格8.E3" office:value-type="string">
            <text:p text:style-name="P16">[]</text:p>
          </table:table-cell>
        </table:table-row>
        <table:table-row table:style-name="表格8.1">
          <table:table-cell table:style-name="表格8.A2" office:value-type="string">
            <text:p text:style-name="P16">（空白）</text:p>
          </table:table-cell>
          <table:table-cell table:style-name="表格8.B2" office:value-type="string">
            <text:p text:style-name="P16">WORD</text:p>
          </table:table-cell>
          <table:table-cell table:style-name="表格8.B2" office:value-type="string">
            <text:p text:style-name="P16">遇到空白：把 token 收進 tokens，狀態變回 INIT</text:p>
          </table:table-cell>
          <table:table-cell table:style-name="表格8.B2" office:value-type="string">
            <text:p text:style-name="P16">""</text:p>
          </table:table-cell>
          <table:table-cell table:style-name="表格8.E2" office:value-type="string">
            <text:p text:style-name="P16">["ls"]</text:p>
          </table:table-cell>
        </table:table-row>
        <table:table-row table:style-name="表格8.1">
          <table:table-cell table:style-name="表格8.A3" office:value-type="string">
            <text:p text:style-name="P16">|</text:p>
          </table:table-cell>
          <table:table-cell table:style-name="表格8.B3" office:value-type="string">
            <text:p text:style-name="P16">INIT</text:p>
          </table:table-cell>
          <table:table-cell table:style-name="表格8.B3" office:value-type="string">
            <text:p text:style-name="P16">不是空白，是 |：狀態變成 PIPE，把 | 加進 token</text:p>
          </table:table-cell>
          <table:table-cell table:style-name="表格8.B3" office:value-type="string">
            <text:p text:style-name="P16">"|"</text:p>
          </table:table-cell>
          <table:table-cell table:style-name="表格8.E3" office:value-type="string">
            <text:p text:style-name="P16">["ls"]</text:p>
          </table:table-cell>
        </table:table-row>
        <table:table-row table:style-name="表格8.1">
          <table:table-cell table:style-name="表格8.A2" office:value-type="string">
            <text:p text:style-name="P16">（空白）</text:p>
          </table:table-cell>
          <table:table-cell table:style-name="表格8.B2" office:value-type="string">
            <text:p text:style-name="P16">PIPE</text:p>
          </table:table-cell>
          <table:table-cell table:style-name="表格8.B2" office:value-type="string">
            <text:p text:style-name="P16">遇到空白：把 token（"|"）收進 tokens，狀態變回 INIT</text:p>
          </table:table-cell>
          <table:table-cell table:style-name="表格8.B2" office:value-type="string">
            <text:p text:style-name="P16">""</text:p>
          </table:table-cell>
          <table:table-cell table:style-name="表格8.E2" office:value-type="string">
            <text:p text:style-name="P16">["ls", "|"]</text:p>
          </table:table-cell>
        </table:table-row>
        <table:table-row table:style-name="表格8.1">
          <table:table-cell table:style-name="表格8.A3" office:value-type="string">
            <text:p text:style-name="P16">g</text:p>
          </table:table-cell>
          <table:table-cell table:style-name="表格8.B3" office:value-type="string">
            <text:p text:style-name="P16">INIT</text:p>
          </table:table-cell>
          <table:table-cell table:style-name="表格8.B3" office:value-type="string">
            <text:p text:style-name="P16">不是空白、不是 |，狀態變成 WORD，把 g 加進 token</text:p>
          </table:table-cell>
          <table:table-cell table:style-name="表格8.B3" office:value-type="string">
            <text:p text:style-name="P16">"g"</text:p>
          </table:table-cell>
          <table:table-cell table:style-name="表格8.E3" office:value-type="string">
            <text:p text:style-name="P16">["ls", "|"]</text:p>
          </table:table-cell>
        </table:table-row>
        <table:table-row table:style-name="表格8.1">
          <table:table-cell table:style-name="表格8.A2" office:value-type="string">
            <text:p text:style-name="P16">r e p</text:p>
          </table:table-cell>
          <table:table-cell table:style-name="表格8.B2" office:value-type="string">
            <text:p text:style-name="P16">WORD</text:p>
          </table:table-cell>
          <table:table-cell table:style-name="表格8.B2" office:value-type="string">
            <text:p text:style-name="P16">一般字元，逐一加進 token</text:p>
          </table:table-cell>
          <table:table-cell table:style-name="表格8.B2" office:value-type="string">
            <text:p text:style-name="P16">"grep"</text:p>
          </table:table-cell>
          <table:table-cell table:style-name="表格8.E2" office:value-type="string">
            <text:p text:style-name="P16">["ls", "|"]</text:p>
          </table:table-cell>
        </table:table-row>
        <table:table-row table:style-name="表格8.1">
          <table:table-cell table:style-name="表格8.A9" office:value-type="string">
            <text:p text:style-name="P16">（讀完）</text:p>
          </table:table-cell>
          <table:table-cell table:style-name="表格8.B9" office:value-type="string">
            <text:p text:style-name="P16">WORD</text:p>
          </table:table-cell>
          <table:table-cell table:style-name="表格8.B9" office:value-type="string">
            <text:p text:style-name="P16">迴圈結束，最後再呼叫一次 addToken()</text:p>
          </table:table-cell>
          <table:table-cell table:style-name="表格8.B9" office:value-type="string">
            <text:p text:style-name="P16">""</text:p>
          </table:table-cell>
          <table:table-cell table:style-name="表格8.E9" office:value-type="string">
            <text:p text:style-name="P16">["ls", "|", "grep"]</text:p>
          </table:table-cell>
        </table:table-row>
      </table:table>
      <text:p text:style-name="P12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5"><text:span text:style-name="T5">⭐ 重點筆記：新手最容易卡住的點</text:span></text:p>
            <text:p text:style-name="P14">很多人第一次看會誤以為 | 是被「丟掉」的，但其實從表格可以看到，| 本身也被當成一個 token 留在 tokens 清單裡（["ls", "|", "grep"]）。真正負責「拿掉 |、依它分組」的是下一步的 parserCmd()，不是 <text:soft-page-break/>parserToken()。分清楚「切字」跟「依 | 分組」是兩個獨立步驟，是看懂這段程式最關鍵的一步。</text:p>
          </table:table-cell>
        </table:table-row>
        <table:table-row table:style-name="表格9.1">
          <table:table-cell table:style-name="表格9.A2" office:value-type="string">
            <text:p text:style-name="P13">✅ 結論 / 口訣</text:p>
            <text:p text:style-name="P14">Parser 的本質只有一句話：把一整行字串，先切成單字，再依 | 分成好幾組指令。它不涉及「執行」，只負責「聽懂使用者在說什麼」。</text:p>
          </table:table-cell>
        </table:table-row>
      </table:table>
      <text:p text:style-name="P9">第三章：執行外部指令——fork、exec、wait</text:p>
      <text:p text:style-name="P18"><text:span text:style-name="T1">📍 對照原始碼：</text:span><text:span text:style-name="T2">execSingleCmd() 約第 232 ~ 248 行、execExternalCmd() 約第 214 ~ 231 行</text:span></text:p>
      <text:p text:style-name="P10">當你打 ls 這種「不是內建指令」的東西時，程式會呼叫 execExternalCmd()，這裡用到的正是整個 Linux Backend 最經典、也最重要的三個系統呼叫：fork、exec、waitpid。</text:p>
      <text:p text:style-name="P23">三個動作分別在做什麼</text:p>
      <table:table table:name="表格10" table:style-name="表格10">
        <table:table-column table:style-name="表格10.A"/>
        <table:table-column table:style-name="表格10.B"/>
        <table:table-header-rows>
          <table:table-row table:style-name="表格10.1">
            <table:table-cell table:style-name="表格10.A1" office:value-type="string">
              <text:p text:style-name="P15">系統呼叫</text:p>
            </table:table-cell>
            <table:table-cell table:style-name="表格10.A1" office:value-type="string">
              <text:p text:style-name="P15">白話解釋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6">fork()</text:p>
          </table:table-cell>
          <table:table-cell table:style-name="表格10.A2" office:value-type="string">
            <text:p text:style-name="P16">把目前的程式「複製」一份，變成兩個一模一樣、各自獨立執行的行程（process），一個叫「父行程」，一個叫「子行程」</text:p>
          </table:table-cell>
        </table:table-row>
        <table:table-row table:style-name="表格10.1">
          <table:table-cell table:style-name="表格10.A3" office:value-type="string">
            <text:p text:style-name="P16">execl()</text:p>
          </table:table-cell>
          <table:table-cell table:style-name="表格10.A3" office:value-type="string">
            <text:p text:style-name="P16">只在子行程裡呼叫，作用是「把子行程目前的程式內容整個換掉」，換成想要執行的新程式（這裡固定換成 /bin/bash 去執行使用者打的指令）</text:p>
          </table:table-cell>
        </table:table-row>
        <table:table-row table:style-name="表格10.1">
          <table:table-cell table:style-name="表格10.A2" office:value-type="string">
            <text:p text:style-name="P16">waitpid()</text:p>
          </table:table-cell>
          <table:table-cell table:style-name="表格10.A2" office:value-type="string">
            <text:p text:style-name="P16">只在父行程裡呼叫，作用是「暫停等待」，直到子行程執行完畢，並取得子行程的結束狀態</text:p>
          </table:table-cell>
        </table:table-row>
        <table:table-row table:style-name="表格10.1">
          <table:table-cell table:style-name="表格10.A5" table:number-columns-spanned="2" office:value-type="string">
            <text:p text:style-name="P19">呼叫 execExternalCmd(cmd)</text:p>
            <text:p text:style-name="P19"><text:s text:c="8"/>│</text:p>
            <text:p text:style-name="P19"><text:s text:c="5"/>fork()</text:p>
            <text:p text:style-name="P19"><text:s text:c="8"/>│</text:p>
            <text:p text:style-name="P19"><text:s text:c="3"/>┌────┴────┐</text:p>
            <text:p text:style-name="P19"><text:s text:c="3"/>│ <text:s text:c="8"/>│</text:p>
            <text:p text:style-name="P19">子行程 <text:s text:c="4"/>父行程</text:p>
            <text:p text:style-name="P19"><text:s text:c="3"/>│ <text:s text:c="8"/>│</text:p>
            <text:p text:style-name="P19">execl() <text:s text:c="2"/>waitpid() <text:s/>← 停在這裡等</text:p>
            <text:p text:style-name="P19">(變身成 <text:s text:c="3"/>(直到子行程執行完畢)</text:p>
            <text:p text:style-name="P19"><text:s/>目標程式) <text:s text:c="4"/>│</text:p>
            <text:p text:style-name="P19"><text:s text:c="3"/>│ <text:s text:c="8"/>│</text:p>
            <text:p text:style-name="P19">執行結束 <text:s text:c="2"/>收到結果，繼續下一輪</text:p>
          </table:table-cell>
          <table:covered-table-cell/>
        </table:table-row>
      </table:table>
      <text:p text:style-name="P12"/>
      <text:p text:style-name="P20"><text:span text:style-name="T3">實際對照原始碼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6"><text:span text:style-name="T6"><text:s/>214 <text:s/></text:span><text:span text:style-name="T7">void execExternalCmd(vector&lt;string&gt; &amp;cmd) {</text:span></text:p>
            <text:p text:style-name="P26"><text:soft-page-break/><text:span text:style-name="T6"><text:s/>216 <text:s/></text:span><text:span text:style-name="T7"><text:s text:c="2"/>pid_t pid = fork(); <text:s text:c="9"/>// 複製出一個子行程</text:span></text:p>
            <text:p text:style-name="P26"><text:span text:style-name="T6"><text:s/>221 <text:s/></text:span><text:span text:style-name="T7"><text:s text:c="2"/>if (pid == 0) { <text:s text:c="13"/>// pid == 0，代表這裡是子行程</text:span></text:p>
            <text:p text:style-name="P26"><text:span text:style-name="T6"><text:s/>222 <text:s/></text:span><text:span text:style-name="T7"><text:s text:c="4"/>execl("/bin/bash", "bash", "-c", getCommand(cmd).c_str(), nullptr);</text:span></text:p>
            <text:p text:style-name="P26"><text:span text:style-name="T6"><text:s/>223 <text:s/></text:span><text:span text:style-name="T7"><text:s text:c="4"/>exit(1); <text:s text:c="18"/>// execl 失敗才會走到這行</text:span></text:p>
            <text:p text:style-name="P26"><text:span text:style-name="T6"><text:s/>224 <text:s/></text:span><text:span text:style-name="T7"><text:s text:c="2"/>}</text:span></text:p>
            <text:p text:style-name="P26"><text:span text:style-name="T6"><text:s/>226 <text:s/></text:span><text:span text:style-name="T7"><text:s text:c="2"/>int status = 0;</text:span></text:p>
            <text:p text:style-name="P26"><text:span text:style-name="T6"><text:s/>227 <text:s/></text:span><text:span text:style-name="T7"><text:s text:c="2"/>int ret = waitpid(pid, &amp;status, 0); <text:s/>// 父行程停在這裡，等子行程結束</text:span></text:p>
            <text:p text:style-name="P26"><text:span text:style-name="T6"><text:s/>230 <text:s/></text:span><text:span text:style-name="T7">}</text:span></text:p>
          </table:table-cell>
        </table:table-row>
      </table:table>
      <text:p text:style-name="P12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⭐ 重點筆記：新手最容易卡住的點</text:p>
            <text:p text:style-name="P14">fork() 只呼叫一次，但它「回傳兩次」：在父行程裡回傳子行程的 pid（一個大於 0 的數字），在子行程裡回傳 0。所以 if (pid == 0) 這一行，其實是用「回傳值是不是 0」來判斷「現在執行到這裡的，究竟是父行程還是子行程」——兩個行程會各自執行到這一行、各自往不同分支走下去，這是第一次看容易誤解的地方。</text:p>
          </table:table-cell>
        </table:table-row>
        <table:table-row table:style-name="表格12.1">
          <table:table-cell table:style-name="表格12.A2" office:value-type="string">
            <text:p text:style-name="P27">🔍 深入推導：為什麼要「複製一份」再「換身分」，而不是直接執行？</text:p>
            <text:p text:style-name="P14">因為 Shell 本身也是一個正在執行中的程式，如果直接讓自己「變身」成 ls，那個 ls 執行完之後，Shell 這個程式本身也就跟著消失了，沒辦法再回來印下一個提示字元。所以正確做法是：先複製一份自己（fork），讓「複製品」去變身執行使用者的指令，本尊（父行程）則留在原地等待，指令做完後本尊繼續存活、印出下一個提示字元。</text:p>
          </table:table-cell>
        </table:table-row>
        <table:table-row table:style-name="表格12.1">
          <table:table-cell table:style-name="表格12.A1" office:value-type="string">
            <text:p text:style-name="P17">⭐ 重點筆記：這份程式的一個小細節</text:p>
            <text:p text:style-name="P14">子行程並不是直接執行 ls 這個檔案本身，而是呼叫 execl("/bin/bash", "bash", "-c", 「使用者輸入的整行指令」)。也就是說，真正做事的其實是再借用一個 bash 去解讀並執行那行指令，這份 mini shell 本身沒有自己去查 PATH、找可執行檔——這是它為了簡化教學而選擇的做法，跟正式的 Shell（會自己搜尋 PATH 並直接 execve 目標程式）不完全一樣。</text:p>
          </table:table-cell>
        </table:table-row>
      </table:table>
      <text:p text:style-name="P9">第四章：內建指令（Builtin Commands）</text:p>
      <text:p text:style-name="P18"><text:span text:style-name="T1">📍 對照原始碼：</text:span><text:span text:style-name="T2">cd() 約第 74 ~ 97 行、pwd() 第 98 行、history() 約第 100 ~ 105 行、env() 約第 68 ~ 73 行</text:span></text:p>
      <text:p text:style-name="P10">cd、pwd、history、env、exit 這幾個指令，程式並不會呼叫 fork 去交給子行程執行，而是「Shell 自己親自處理」。原因要從 cd 講起，這是理解「為什麼需要內建指令」最關鍵的一個問題。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7">🔍 深入推導：為什麼 cd 不能透過 fork 出去的子行程來做？</text:p>
            <text:p text:style-name="P28"><text:span text:style-name="T8">每一個行程都有屬於自己的一份「目前工作目錄」記錄，fork 出來的子行程雖然一開始複製了父行程的這</text:span><text:soft-page-break/><text:span text:style-name="T8">份記錄，但兩者從此各自獨立——子行程呼叫 chdir() 更改目錄，只會改到「子行程自己那一份」，子行程結束後這個改變就跟著消失，父行程（也就是這個 Shell 本身）的工作目錄完全不受影響。</text:span></text:p>
            <text:p text:style-name="P14">所以如果 cd 也用 fork + exec 去做，你會發現每次 cd 完，下一次打 pwd 又跳回原本的目錄，等於 cd 完全沒用。唯一的解法就是：cd 必須由 Shell 本尊（父行程）親自呼叫 chdir()，不能假手他人。</text:p>
          </table:table-cell>
        </table:table-row>
      </table:table>
      <text:p text:style-name="P23">執行邏輯</text:p>
      <text:p text:style-name="P10">execSingleCmd() 會先檢查指令名稱是不是這幾個內建指令之一，是的話就直接呼叫對應的 C++ 函式；不是的話，才會走前一章的 fork + exec 流程去外部執行。</text:p>
      <table:table table:name="表格14" table:style-name="表格14">
        <table:table-column table:style-name="表格14.A"/>
        <table:table-column table:style-name="表格14.B"/>
        <table:table-header-rows>
          <table:table-row table:style-name="表格14.1">
            <table:table-cell table:style-name="表格14.A1" office:value-type="string">
              <text:p text:style-name="P15">指令</text:p>
            </table:table-cell>
            <table:table-cell table:style-name="表格14.B1" office:value-type="string">
              <text:p text:style-name="P15">行為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6">cd</text:p>
          </table:table-cell>
          <table:table-cell table:style-name="表格14.B2" office:value-type="string">
            <text:p text:style-name="P16">呼叫 chdir() 改變目前工作目錄；不加參數時回 HOME；cd - 回到上一個目錄（OLDPWD）</text:p>
          </table:table-cell>
        </table:table-row>
        <table:table-row table:style-name="表格14.1">
          <table:table-cell table:style-name="表格14.A3" office:value-type="string">
            <text:p text:style-name="P16">pwd</text:p>
          </table:table-cell>
          <table:table-cell table:style-name="表格14.B3" office:value-type="string">
            <text:p text:style-name="P16">印出目前工作目錄（getcwd）</text:p>
          </table:table-cell>
        </table:table-row>
        <table:table-row table:style-name="表格14.1">
          <table:table-cell table:style-name="表格14.A2" office:value-type="string">
            <text:p text:style-name="P16">env</text:p>
          </table:table-cell>
          <table:table-cell table:style-name="表格14.B2" office:value-type="string">
            <text:p text:style-name="P16">印出所有環境變數</text:p>
          </table:table-cell>
        </table:table-row>
        <table:table-row table:style-name="表格14.1">
          <table:table-cell table:style-name="表格14.A3" office:value-type="string">
            <text:p text:style-name="P16">history</text:p>
          </table:table-cell>
          <table:table-cell table:style-name="表格14.B3" office:value-type="string">
            <text:p text:style-name="P16">印出歷史指令清單（索引、時間、內容）</text:p>
          </table:table-cell>
        </table:table-row>
        <table:table-row table:style-name="表格14.1">
          <table:table-cell table:style-name="表格14.A6" office:value-type="string">
            <text:p text:style-name="P16">exit</text:p>
          </table:table-cell>
          <table:table-cell table:style-name="表格14.B6" office:value-type="string">
            <text:p text:style-name="P16">還原終端機設定後結束程式</text:p>
          </table:table-cell>
        </table:table-row>
      </table:table>
      <text:p text:style-name="P9">第五章：管道 Pipe——最值得花時間搞懂的部分</text:p>
      <text:p text:style-name="P18"><text:span text:style-name="T1">📍 對照原始碼：</text:span><text:span text:style-name="T2">myPipe() 約第 249 ~ 273 行、execPipeCmd() 約第 281 ~ 303 行</text:span></text:p>
      <text:p text:style-name="P10">管道 | 的概念其實一點都不神奇：它就是「把上一個指令的標準輸出（stdout），接到下一個指令的標準輸入（stdin）」。程式裡的 dup2() 正是在做這件「重新接線」的動作。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9">指令一 (ls) <text:s/>的 stdout</text:p>
            <text:p text:style-name="P19"><text:s text:c="8"/>│</text:p>
            <text:p text:style-name="P19"><text:s text:c="8"/>▼</text:p>
            <text:p text:style-name="P19"><text:s text:c="5"/>[ pipe 緩衝區 ]</text:p>
            <text:p text:style-name="P19"><text:s text:c="8"/>│</text:p>
            <text:p text:style-name="P19"><text:s text:c="8"/>▼</text:p>
            <text:p text:style-name="P19">指令二 (grep cpp) 的 stdin</text:p>
          </table:table-cell>
        </table:table-row>
      </table:table>
      <text:p text:style-name="P23">myPipe() 在子行程裡做的三件事</text:p>
      <text:list text:continue-numbering="true" text:style-name="WWNum2">
        <text:list-item>
          <text:p text:style-name="P11">如果有上一段的輸出，用 dup2(input, STDIN_FILENO) 把它接成自己的標準輸入</text:p>
        </text:list-item>
        <text:list-item>
          <text:p text:style-name="P11">用 dup2(pfd[1], STDOUT_FILENO) 把自己的標準輸出接到新建立的 pipe 寫入端</text:p>
        </text:list-item>
        <text:list-item>
          <text:p text:style-name="P29"><text:soft-page-break/><text:span text:style-name="T4">呼叫 execl 變身成真正要執行的指令（例如 grep cpp）</text:span></text:p>
        </text:list-item>
      </text:list>
      <text:p text:style-name="P12"/>
      <text:p text:style-name="P23">實際對照原始碼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6"><text:span text:style-name="T6"><text:s/>255 <text:s/></text:span><text:span text:style-name="T7"><text:s text:c="2"/>if (0 == pid) { <text:s text:c="20"/>// 子行程</text:span></text:p>
            <text:p text:style-name="P26"><text:span text:style-name="T6"><text:s/>256 <text:s/></text:span><text:span text:style-name="T7"><text:s text:c="4"/>if (input != -1) {</text:span></text:p>
            <text:p text:style-name="P26"><text:span text:style-name="T6"><text:s/>257 <text:s/></text:span><text:span text:style-name="T7"><text:s text:c="6"/>dup2(input, STDIN_FILENO); <text:s text:c="5"/>// 上一段的輸出，接成自己的輸入</text:span></text:p>
            <text:p text:style-name="P26"><text:span text:style-name="T6"><text:s/>258 <text:s/></text:span><text:span text:style-name="T7"><text:s text:c="6"/>close(input);</text:span></text:p>
            <text:p text:style-name="P26"><text:span text:style-name="T6"><text:s/>259 <text:s/></text:span><text:span text:style-name="T7"><text:s text:c="4"/>}</text:span></text:p>
            <text:p text:style-name="P26"><text:span text:style-name="T6"><text:s/>260 <text:s/></text:span><text:span text:style-name="T7"><text:s text:c="4"/>dup2(pfd[1], STDOUT_FILENO); <text:s text:c="5"/>// 自己的輸出，接到新 pipe 的寫入端</text:span></text:p>
            <text:p text:style-name="P26"><text:span text:style-name="T6"><text:s/>263 <text:s/></text:span><text:span text:style-name="T7"><text:s text:c="4"/>execl("/bin/bash", "bash", "-c", getCommand(cmd).c_str(), (char*)0);</text:span></text:p>
            <text:p text:style-name="P26"><text:span text:style-name="T6"><text:s/>265 <text:s/></text:span><text:span text:style-name="T7"><text:s text:c="2"/>}</text:span></text:p>
          </table:table-cell>
        </table:table-row>
      </table:table>
      <text:p text:style-name="P12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7">⭐ 重點筆記：先懂這一句就夠：新手版本</text:p>
            <text:p text:style-name="P14">input 是「上一段指令」的輸出，output 是「這一段指令」的輸出。dup2 做的事情，白話講就是「把插頭拔掉、插到別的插座上」：把子行程的標準輸入插頭，插到上一段的輸出；把子行程的標準輸出插頭，插到這一段新建立的 pipe。看懂這兩行 dup2，就已經看懂 Pipe 最核心的機制了，下面這個進階觀察可以先跳過，之後再回來看。</text:p>
          </table:table-cell>
        </table:table-row>
        <table:table-row table:style-name="表格17.1">
          <table:table-cell table:style-name="表格17.A2" office:value-type="string">
            <text:p text:style-name="P30">⚠️ 易錯 / 陷阱：進階觀察：這份程式的 Pipe 跟真正的 bash 不完全一樣</text:p>
            <text:p text:style-name="P14">真正的 bash 執行 A | B | C 時，是把三個行程「一次全部 fork 出來」，讓它們同時併發執行，資料像水流一樣邊產生邊被下一段消化。</text:p>
            <text:p text:style-name="P14">但這份程式的 execPipeCmd() 是「一段一段來」：先完整跑完並等待（waitpid）第一段指令執行結束，才把它的輸出接給下一段當輸入、再往下執行。也就是說，指令二要等指令一「整個跑完」才會開始執行，並不是真正同時併發。</text:p>
            <text:p text:style-name="P14">這在輸出量小的時候感覺不出差異，但如果某個指令要處理的資料量很大、超過系統 pipe 緩衝區（Linux 預設約 64KB）的容量，就有機會卡住（因為沒有人即時把資料讀走，寫入端會被塞滿而阻塞）。理解這個「循序 vs. 併發」的差異，是看穿這份教學程式與正式 Shell 差別的關鍵，也是很好的思考題。</text:p>
          </table:table-cell>
        </table:table-row>
        <table:table-row table:style-name="表格17.1">
          <table:table-cell table:style-name="表格17.A3" office:value-type="string">
            <text:p text:style-name="P13">✅ 結論 / 口訣</text:p>
            <text:p text:style-name="P14">一句話記住 Pipe：dup2 負責「接線」，fork 負責「複製出兩個各自獨立又能透過管道通話的行程」。理解了這點，之後看到任何跟 stdin/stdout 重導向有關的程式碼，都能一眼看懂在做什麼。</text:p>
          </table:table-cell>
        </table:table-row>
      </table:table>
      <text:p text:style-name="P31"><text:span text:style-name="T9">第六章：終端機與游標控制</text:span></text:p>
      <text:p text:style-name="P18"><text:span text:style-name="T1">📍 對照原始碼：</text:span><text:span text:style-name="T2">initEnvs() 約第 33 ~ 49 行（termios 設定）、getCmdLine() 約第 430 ~ 486 行（讀鍵盤主迴</text:span><text:soft-page-break/><text:span text:style-name="T2">圈）</text:span></text:p>
      <text:p text:style-name="P10">看到 termios、Ctrl+A、方向鍵這些東西不用害怕，這一部分其實跟「Shell 邏輯」完全無關，它單純是在處理「怎麼即時讀取鍵盤按鍵、並且自己畫出游標移動的效果」。</text:p>
      <text:p text:style-name="P23">為什麼要動用 termios？</text:p>
      <text:p text:style-name="P10">終端機預設是「整行輸入模式」：使用者要按下 Enter，作業系統才會把整行文字一次丟給程式，而且輸入的字元會自動被終端機顯示出來（回顯）。initEnvs() 裡關閉了 ICANON（整行模式）與 ECHO（自動回顯），改成「使用者每按一個鍵，程式就立刻收到那一個字元」，如此一來程式才能自己判斷這個鍵是不是方向鍵、Backspace，並自己控制畫面要怎麼顯示。</text:p>
      <text:p text:style-name="P23">方向鍵其實是三個字元組成的密碼</text:p>
      <text:p text:style-name="P10">鍵盤上的「↑」並不是單一個字元，而是連續送出三個字元：ESC、[、A（Escape Sequence，跳脫序列）。程式用一個 convert 旗標記住「剛才是不是收到了 ESC」，如果是，下一個字元收到 [ 就先略過，再收到 A/B/C/D 就分別代表上/下/右/左。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15">按鍵</text:p>
            </table:table-cell>
            <table:table-cell table:style-name="表格18.B1" office:value-type="string">
              <text:p text:style-name="P15">實際收到的字元</text:p>
            </table:table-cell>
            <table:table-cell table:style-name="表格18.C1" office:value-type="string">
              <text:p text:style-name="P15">對應動作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16">↑（上）</text:p>
          </table:table-cell>
          <table:table-cell table:style-name="表格18.B2" office:value-type="string">
            <text:p text:style-name="P16">ESC <text:s/>[ <text:s/>A</text:p>
          </table:table-cell>
          <table:table-cell table:style-name="表格18.C2" office:value-type="string">
            <text:p text:style-name="P16">showPreCmd()：顯示上一條歷史指令</text:p>
          </table:table-cell>
        </table:table-row>
        <table:table-row table:style-name="表格18.1">
          <table:table-cell table:style-name="表格18.A3" office:value-type="string">
            <text:p text:style-name="P16">↓（下）</text:p>
          </table:table-cell>
          <table:table-cell table:style-name="表格18.B3" office:value-type="string">
            <text:p text:style-name="P16">ESC <text:s/>[ <text:s/>B</text:p>
          </table:table-cell>
          <table:table-cell table:style-name="表格18.C3" office:value-type="string">
            <text:p text:style-name="P16">showNextCmd()：顯示下一條歷史指令</text:p>
          </table:table-cell>
        </table:table-row>
        <table:table-row table:style-name="表格18.1">
          <table:table-cell table:style-name="表格18.A2" office:value-type="string">
            <text:p text:style-name="P16">→（右）</text:p>
          </table:table-cell>
          <table:table-cell table:style-name="表格18.B2" office:value-type="string">
            <text:p text:style-name="P16">ESC <text:s/>[ <text:s/>C</text:p>
          </table:table-cell>
          <table:table-cell table:style-name="表格18.C2" office:value-type="string">
            <text:p text:style-name="P16">cursorMoveRight()：游標右移一格</text:p>
          </table:table-cell>
        </table:table-row>
        <table:table-row table:style-name="表格18.1">
          <table:table-cell table:style-name="表格18.A3" office:value-type="string">
            <text:p text:style-name="P16">←（左）</text:p>
          </table:table-cell>
          <table:table-cell table:style-name="表格18.B3" office:value-type="string">
            <text:p text:style-name="P16">ESC <text:s/>[ <text:s/>D</text:p>
          </table:table-cell>
          <table:table-cell table:style-name="表格18.C3" office:value-type="string">
            <text:p text:style-name="P16">cursorMoveLeft()：游標左移一格</text:p>
          </table:table-cell>
        </table:table-row>
        <table:table-row table:style-name="表格18.1">
          <table:table-cell table:style-name="表格18.A2" office:value-type="string">
            <text:p text:style-name="P16">Backspace</text:p>
          </table:table-cell>
          <table:table-cell table:style-name="表格18.B2" office:value-type="string">
            <text:p text:style-name="P16">127（DEL）</text:p>
          </table:table-cell>
          <table:table-cell table:style-name="表格18.C2" office:value-type="string">
            <text:p text:style-name="P16">backSpace()：刪除游標前一個字元</text:p>
          </table:table-cell>
        </table:table-row>
        <table:table-row table:style-name="表格18.1">
          <table:table-cell table:style-name="表格18.A3" office:value-type="string">
            <text:p text:style-name="P16">Ctrl + A</text:p>
          </table:table-cell>
          <table:table-cell table:style-name="表格18.B3" office:value-type="string">
            <text:p text:style-name="P16">1</text:p>
          </table:table-cell>
          <table:table-cell table:style-name="表格18.C3" office:value-type="string">
            <text:p text:style-name="P16">cursorMoveHead()：游標移到行首</text:p>
          </table:table-cell>
        </table:table-row>
        <table:table-row table:style-name="表格18.1">
          <table:table-cell table:style-name="表格18.A8" office:value-type="string">
            <text:p text:style-name="P16">Ctrl + U</text:p>
          </table:table-cell>
          <table:table-cell table:style-name="表格18.B8" office:value-type="string">
            <text:p text:style-name="P16">21</text:p>
          </table:table-cell>
          <table:table-cell table:style-name="表格18.C8" office:value-type="string">
            <text:p text:style-name="P16">clearPrefixCmdLine()：清除游標前的所有輸入</text:p>
          </table:table-cell>
        </table:table-row>
      </table:table>
      <text:p text:style-name="P12"/>
      <text:p text:style-name="P23">實際對照原始碼：getCmdLine() 怎麼判斷「這是方向鍵」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pan text:style-name="T6"><text:s/>432 <text:s/></text:span><text:span text:style-name="T7"><text:s text:c="2"/>bool convert = false; <text:s text:c="13"/>// 記住「剛才是不是收到了 ESC」</text:span></text:p>
            <text:p text:style-name="P26"><text:span text:style-name="T6"><text:s/>434 <text:s/></text:span><text:span text:style-name="T7"><text:s text:c="2"/>while (true) {</text:span></text:p>
            <text:p text:style-name="P26"><text:span text:style-name="T6"><text:s/>435 <text:s/></text:span><text:span text:style-name="T7"><text:s text:c="4"/>ch = getchar(); <text:s text:c="17"/>// 每次只讀一個字元</text:span></text:p>
            <text:p text:style-name="P26"><text:span text:style-name="T6"><text:s/>436 <text:s/></text:span><text:span text:style-name="T7"><text:s text:c="4"/>if (ch == kEsc) { convert = true; continue; } <text:s text:c="2"/>// 收到 ESC，先做記號</text:span></text:p>
            <text:p text:style-name="P32"><text:s/>... <text:s/></text:p>
            <text:p text:style-name="P26"><text:span text:style-name="T6"><text:s/>464 <text:s/></text:span><text:span text:style-name="T7"><text:s text:c="4"/>if (convert &amp;&amp; ch == 'A') { showPreCmd(...); continue; } <text:s/>// ESC 後收到 A</text:span></text:p>
            <text:p text:style-name="P26"><text:span text:style-name="T6"><text:s/>468 <text:s/></text:span><text:span text:style-name="T7"><text:s text:c="4"/>if (convert &amp;&amp; ch == 'B') { showNextCmd(...); continue; } // ESC 後收到 B</text:span></text:p>
            <text:p text:style-name="P32"><text:s/>... <text:s/></text:p>
            <text:p text:style-name="P26"><text:span text:style-name="T6"><text:s/>480 <text:s/></text:span><text:span text:style-name="T7"><text:s text:c="4"/>if (convert &amp;&amp; ch == '[') { continue; } <text:s text:c="7"/>// ESC 後的 [，直接略過不處理</text:span></text:p>
          </table:table-cell>
        </table:table-row>
      </table:table>
      <text:p text:style-name="P12"/>
      <table:table table:name="表格20" table:style-name="表格20">
        <table:table-column table:style-name="表格20.A"/>
        <text:soft-page-break/>
        <table:table-row table:style-name="表格20.1">
          <table:table-cell table:style-name="表格20.A1" office:value-type="string">
            <text:p text:style-name="P17">⭐ 重點筆記</text:p>
            <text:p text:style-name="P14">所有這些函式做的事情本質上都一樣：先用 printf("\b") 或 ANSI 逃逸碼（例如 \033[1D）操作畫面上的游標，再同步更新程式內部那份 cmdLine 字串，讓「螢幕上看到的」跟「程式記憶體裡存的」隨時保持一致。</text:p>
          </table:table-cell>
        </table:table-row>
      </table:table>
      <text:p text:style-name="P9">第七章：歷史紀錄（History）</text:p>
      <text:p text:style-name="P18"><text:span text:style-name="T1">📍 對照原始碼：</text:span><text:span text:style-name="T2">setHistory() 約第 187 ~ 199 行、showPreCmd()／showNextCmd() 約第 408 ~ 429 行</text:span></text:p>
      <text:p text:style-name="P10">每次執行完一行指令，setHistory() 就會把「索引、時間、指令內容」存進 historyCmdLines 這個清單裡，history 指令就是把整個清單印出來。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⭐ 重點筆記：一個容易忽略的細節</text:p>
            <text:p text:style-name="P14">在 main() 裡，setHistory(cmdLine) 是在 getCmdLine() 讀完輸入「之後」才呼叫的，也就是說：使用者正在打字、還沒按 Enter 的這一行，並不會出現在歷史清單裡，只有已經按下 Enter、確定送出的指令才會被記錄。所以在 getCmdLine() 內部按上下鍵瀏覽歷史時，看到的永遠是「之前已經執行過」的指令，不包含正在打的這一行。</text:p>
          </table:table-cell>
        </table:table-row>
      </table:table>
      <text:p text:style-name="P9">第八章：建議的自學路線</text:p>
      <text:p text:style-name="P10">看懂程式碼只是第一步，真正讓知識變成自己的東西，要靠「重讀」跟「自己動手重寫」。以下是建議的節奏，一天專攻一個模組即可，不用急：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header-rows>
          <table:table-row table:style-name="表格22.1">
            <table:table-cell table:style-name="表格22.A1" office:value-type="string">
              <text:p text:style-name="P15">順序</text:p>
            </table:table-cell>
            <table:table-cell table:style-name="表格22.B1" office:value-type="string">
              <text:p text:style-name="P15">模組</text:p>
            </table:table-cell>
            <table:table-cell table:style-name="表格22.C1" office:value-type="string">
              <text:p text:style-name="P15">這階段的目標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16">1</text:p>
          </table:table-cell>
          <table:table-cell table:style-name="表格22.B2" office:value-type="string">
            <text:p text:style-name="P16">main()</text:p>
          </table:table-cell>
          <table:table-cell table:style-name="表格22.C2" office:value-type="string">
            <text:p text:style-name="P16">看懂整體流程圖，說得出「Shell 就是一個無限迴圈」</text:p>
          </table:table-cell>
        </table:table-row>
        <table:table-row table:style-name="表格22.1">
          <table:table-cell table:style-name="表格22.A3" office:value-type="string">
            <text:p text:style-name="P16">2</text:p>
          </table:table-cell>
          <table:table-cell table:style-name="表格22.B3" office:value-type="string">
            <text:p text:style-name="P16">parser()</text:p>
          </table:table-cell>
          <table:table-cell table:style-name="表格22.C3" office:value-type="string">
            <text:p text:style-name="P16">看懂一行字串怎麼被拆成 token、再依 | 分組</text:p>
          </table:table-cell>
        </table:table-row>
        <table:table-row table:style-name="表格22.1">
          <table:table-cell table:style-name="表格22.A2" office:value-type="string">
            <text:p text:style-name="P16">3</text:p>
          </table:table-cell>
          <table:table-cell table:style-name="表格22.B2" office:value-type="string">
            <text:p text:style-name="P16">execExternalCmd()</text:p>
          </table:table-cell>
          <table:table-cell table:style-name="表格22.C2" office:value-type="string">
            <text:p text:style-name="P16">看懂 fork / exec / waitpid 三步驟怎麼合作</text:p>
          </table:table-cell>
        </table:table-row>
        <table:table-row table:style-name="表格22.1">
          <table:table-cell table:style-name="表格22.A3" office:value-type="string">
            <text:p text:style-name="P16">4</text:p>
          </table:table-cell>
          <table:table-cell table:style-name="表格22.B3" office:value-type="string">
            <text:p text:style-name="P16">cd、pwd 等內建指令</text:p>
          </table:table-cell>
          <table:table-cell table:style-name="表格22.C3" office:value-type="string">
            <text:p text:style-name="P16">說得出「為什麼 cd 不能用 fork 做」</text:p>
          </table:table-cell>
        </table:table-row>
        <table:table-row table:style-name="表格22.1">
          <table:table-cell table:style-name="表格22.A2" office:value-type="string">
            <text:p text:style-name="P16">5</text:p>
          </table:table-cell>
          <table:table-cell table:style-name="表格22.B2" office:value-type="string">
            <text:p text:style-name="P16">pipe</text:p>
          </table:table-cell>
          <table:table-cell table:style-name="表格22.C2" office:value-type="string">
            <text:p text:style-name="P16">看懂 dup2 怎麼接線，並理解這份程式的 pipe 是循序執行</text:p>
          </table:table-cell>
        </table:table-row>
        <table:table-row table:style-name="表格22.1">
          <table:table-cell table:style-name="表格22.A3" office:value-type="string">
            <text:p text:style-name="P16">6</text:p>
          </table:table-cell>
          <table:table-cell table:style-name="表格22.B3" office:value-type="string">
            <text:p text:style-name="P16">history</text:p>
          </table:table-cell>
          <table:table-cell table:style-name="表格22.C3" office:value-type="string">
            <text:p text:style-name="P16">看懂什麼時候一行指令才會被記錄進歷史</text:p>
          </table:table-cell>
        </table:table-row>
        <table:table-row table:style-name="表格22.1">
          <table:table-cell table:style-name="表格22.A8" office:value-type="string">
            <text:p text:style-name="P16">7</text:p>
          </table:table-cell>
          <table:table-cell table:style-name="表格22.B8" office:value-type="string">
            <text:p text:style-name="P16">termios 與鍵盤控制</text:p>
          </table:table-cell>
          <table:table-cell table:style-name="表格22.C8" office:value-type="string">
            <text:p text:style-name="P16">看懂方向鍵其實是 ESC 開頭的跳脫序列</text:p>
          </table:table-cell>
        </table:table-row>
      </table:table>
      <text:p text:style-name="P12"/>
      <table:table table:name="表格23" table:style-name="表格23">
        <table:table-column table:style-name="表格23.A"/>
        <text:soft-page-break/>
        <table:table-row table:style-name="表格23.1">
          <table:table-cell table:style-name="表格23.A1" office:value-type="string">
            <text:p text:style-name="P13">✅ 結論 / 口訣：最後、也是最重要的一步：自己重寫一次</text:p>
            <text:p text:style-name="P14">不要用複製貼上的方式讀完就結束。建議照下面的順序，自己從空白檔案開始，一次只加一個功能：</text:p>
            <text:p text:style-name="P14">① 只有 40 行的最小版本：印提示字元 → 讀一行 → fork → execl → waitpid，能執行 ls 就算成功。</text:p>
            <text:p text:style-name="P14">② 加上 cd、pwd 兩個內建指令。</text:p>
            <text:p text:style-name="P14">③ 加上像樣的 parser（先只支援拆空白，不用管 pipe）。</text:p>
            <text:p text:style-name="P14">④ 加上 pipe 支援。</text:p>
            <text:p text:style-name="P14">⑤ 最後才加 history 跟方向鍵這種「錦上添花」的功能。</text:p>
            <text:p text:style-name="P14">如果你能不看書、自己把一個簡化版重新寫出來，代表你已經真正理解 fork、exec、pipe、檔案描述符這幾個 Linux Backend 最核心的觀念，這比背下 500 行程式碼有價值得多。</text:p>
          </table:table-cell>
        </table:table-row>
      </table:table>
      <text:p text:style-name="P9">總結：一張圖記住整份程式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9"><text:s text:c="17"/>┌───────────────────────┐</text:p>
            <text:p text:style-name="P19"><text:s text:c="17"/>│ <text:s text:c="7"/>main() 迴圈 <text:s text:c="6"/>│</text:p>
            <text:p text:style-name="P19"><text:s text:c="17"/>└───────────┬───────────┘</text:p>
            <text:p text:style-name="P19"><text:s text:c="29"/>│</text:p>
            <text:p text:style-name="P19"><text:s text:c="6"/>印 prompt → 讀輸入 → 記歷史 → parser → execCmd</text:p>
            <text:p text:style-name="P19"><text:s text:c="45"/>│</text:p>
            <text:p text:style-name="P19"><text:s text:c="21"/>┌───────────────────────┼───────────────────────┐</text:p>
            <text:p text:style-name="P19"><text:s text:c="21"/>▼ <text:s text:c="46"/>▼</text:p>
            <text:p text:style-name="P19"><text:s text:c="12"/>單一指令 execSingleCmd <text:s text:c="25"/>多指令(有|) execPipeCmd</text:p>
            <text:p text:style-name="P19"><text:s text:c="21"/>│ <text:s text:c="46"/>│</text:p>
            <text:p text:style-name="P19"><text:s text:c="8"/>┌────────────┼────────────┐ <text:s text:c="23"/>逐段 fork + dup2</text:p>
            <text:p text:style-name="P19"><text:s text:c="8"/>▼ <text:s text:c="24"/>▼ <text:s text:c="25"/>串接 stdout→stdin</text:p>
            <text:p text:style-name="P19"><text:s text:c="2"/>內建指令(cd/pwd/ <text:s text:c="9"/>外部指令：</text:p>
            <text:p text:style-name="P19"><text:s text:c="2"/>history/env/exit) <text:s text:c="4"/>fork + execl(bash -c) + waitpid</text:p>
            <text:p text:style-name="P19"><text:s text:c="2"/>Shell 本尊親自處理</text:p>
          </table:table-cell>
        </table:table-row>
      </table:table>
      <text:p text:style-name="P1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7">🔍 深入推導</text:p>
            <text:p text:style-name="P28"><text:span text:style-name="T8">整份程式其實只是把 Linux Backend 三個最基礎的觀念——「行程（process）」「系統呼叫（system call）」「檔案描述符（file descriptor）」——包裝成一個看得見、摸得著、可以自己動手改的小型 Shell。把這張總圖記熟，之後不管在課本上還是在真正的作業系統原始碼裡看到 fork / exec / pipe，都能立刻對應回這裡學到的畫面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44444" loext:opacity="10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444444" loext:opacity="10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459cm" fo:margin-left="0.741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51pt solid #cccccc"/>
      <style:text-properties fo:color="#888888" loext:opacity="100%" style:font-name="Microsoft JhengHei" fo:font-size="8pt" style:font-name-asian="Microsoft JhengHei1" style:font-size-asian="8pt" style:font-name-complex="Microsoft JhengHei1" style:font-size-complex="8pt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Microsoft JhengHei" fo:font-size="8pt" style:font-name-asian="Microsoft JhengHei1" style:font-size-asian="8pt" style:font-name-complex="Microsoft JhengHei1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.293cm" fo:margin-right="2.29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1.044cm" fo:margin-left="0cm" fo:margin-right="0cm" fo:margin-top="0.94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nux Backend 學習筆記 — Mini Shell 原始碼解析</text:p>
      </style:header>
      <style:footer>
        <text:p text:style-name="MP2"><text:span text:style-name="MT1">第 </text:span><text:page-number text:select-page="current">12</text:page-number><text:span text:style-name="MT1"><text:s/>頁，共 </text:span><text:page-count>12</text:page-count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7-23T11:41:26.358000000</meta:creation-date>
    <dc:date>2026-07-23T11:41:26.373000000</dc:date>
    <meta:generator>LibreOffice/26.2.4.2$Windows_X86_64 LibreOffice_project/0229ac93fcf0d7cbc6376066c6f35021cef002dc</meta:generator>
    <meta:document-statistic meta:table-count="25" meta:image-count="0" meta:object-count="0" meta:page-count="12" meta:paragraph-count="336" meta:word-count="5957" meta:character-count="10654" meta:non-whitespace-character-count="8961"/>
  </office:meta>
</office:document-meta>
</file>