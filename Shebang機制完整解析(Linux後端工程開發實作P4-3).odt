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2cm" style:rel-width="100%" fo:margin-left="0.009cm" fo:margin-top="0cm" fo:margin-bottom="0cm" table:align="left" style:writing-mode="page"/>
    </style:style>
    <style:style style:name="表格1.A" style:family="table-column">
      <style:table-column-properties style:column-width="17.12cm" style:rel-column-width="65535*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e3f3e6" fo:padding-left="0.459cm" fo:padding-right="0.459cm" fo:padding-top="0.282cm" fo:padding-bottom="0.282cm" fo:border="0.5pt solid #1e7a34">
        <style:background-image/>
      </style:table-cell-properties>
    </style:style>
    <style:style style:name="表格2" style:family="table">
      <style:table-properties style:width="17.12cm" style:rel-width="100%" fo:margin-left="0.009cm" fo:margin-top="0cm" fo:margin-bottom="0cm" table:align="left" style:writing-mode="page"/>
    </style:style>
    <style:style style:name="表格2.A" style:family="table-column">
      <style:table-column-properties style:column-width="17.12cm" style:rel-column-width="65535*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1f3a5f" fo:padding-left="0.353cm" fo:padding-right="0.353cm" fo:padding-top="0.176cm" fo:padding-bottom="0.176cm" fo:border-left="0.5pt solid #1f3a5f" fo:border-right="0.5pt solid #1f3a5f" fo:border-top="0.5pt solid #1f3a5f" fo:border-bottom="0.5pt solid #000000">
        <style:background-image/>
      </style:table-cell-properties>
    </style:style>
    <style:style style:name="表格2.A2" style:family="table-cell">
      <style:table-cell-properties fo:background-color="#fbf1dd" fo:padding-left="0.459cm" fo:padding-right="0.459cm" fo:padding-top="0.318cm" fo:padding-bottom="0.318cm" fo:border-left="0.5pt solid #1f3a5f" fo:border-right="0.5pt solid #1f3a5f" fo:border-top="0.5pt solid #000000" fo:border-bottom="0.5pt solid #1f3a5f">
        <style:background-image/>
      </style:table-cell-properties>
    </style:style>
    <style:style style:name="表格3" style:family="table">
      <style:table-properties style:width="17.12cm" style:rel-width="100%" fo:margin-left="0.009cm" fo:margin-top="0cm" fo:margin-bottom="0cm" table:align="left" style:writing-mode="page"/>
    </style:style>
    <style:style style:name="表格3.A" style:family="table-column">
      <style:table-column-properties style:column-width="17.12cm" style:rel-column-width="65535*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ff3cd" fo:padding-left="0.459cm" fo:padding-right="0.459cm" fo:padding-top="0.282cm" fo:padding-bottom="0.282cm" fo:border="0.5pt solid #8a6d00">
        <style:background-image/>
      </style:table-cell-properties>
    </style:style>
    <style:style style:name="表格4" style:family="table">
      <style:table-properties style:width="17.12cm" style:rel-width="100%" fo:margin-left="0.009cm" fo:margin-top="0cm" fo:margin-bottom="0cm" table:align="left" style:writing-mode="page"/>
    </style:style>
    <style:style style:name="表格4.A" style:family="table-column">
      <style:table-column-properties style:column-width="17.12cm" style:rel-column-width="65535*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2f2" fo:padding-left="0.388cm" fo:padding-right="0.388cm" fo:padding-top="0.282cm" fo:padding-bottom="0.282cm" fo:border="0.5pt solid #d9d9d9">
        <style:background-image/>
      </style:table-cell-properties>
    </style:style>
    <style:style style:name="表格5" style:family="table">
      <style:table-properties style:width="17.12cm" style:rel-width="100%" fo:margin-left="0.009cm" fo:margin-top="0cm" fo:margin-bottom="0cm" table:align="left" style:writing-mode="page"/>
    </style:style>
    <style:style style:name="表格5.A" style:family="table-column">
      <style:table-column-properties style:column-width="17.12cm" style:rel-column-width="65535*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88cm" fo:padding-right="0.388cm" fo:padding-top="0.282cm" fo:padding-bottom="0.282cm" fo:border="0.5pt solid #d9d9d9">
        <style:background-image/>
      </style:table-cell-properties>
    </style:style>
    <style:style style:name="表格6" style:family="table">
      <style:table-properties style:width="17.12cm" style:rel-width="100%" fo:margin-left="0.009cm" fo:margin-top="0cm" fo:margin-bottom="0cm" table:align="left" style:writing-mode="page"/>
    </style:style>
    <style:style style:name="表格6.A" style:family="table-column">
      <style:table-column-properties style:column-width="17.12cm" style:rel-column-width="65535*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2f2" fo:padding-left="0.388cm" fo:padding-right="0.388cm" fo:padding-top="0.282cm" fo:padding-bottom="0.282cm" fo:border="0.5pt solid #d9d9d9">
        <style:background-image/>
      </style:table-cell-properties>
    </style:style>
    <style:style style:name="表格7" style:family="table">
      <style:table-properties style:width="17.12cm" style:rel-width="100%" fo:margin-left="0.009cm" fo:margin-top="0cm" fo:margin-bottom="0cm" table:align="left" style:writing-mode="page"/>
    </style:style>
    <style:style style:name="表格7.A" style:family="table-column">
      <style:table-column-properties style:column-width="17.12cm" style:rel-column-width="65535*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388cm" fo:padding-right="0.388cm" fo:padding-top="0.282cm" fo:padding-bottom="0.282cm" fo:border="0.5pt solid #d9d9d9">
        <style:background-image/>
      </style:table-cell-properties>
    </style:style>
    <style:style style:name="表格8" style:family="table">
      <style:table-properties style:width="17.12cm" style:rel-width="100%" fo:margin-left="0.009cm" fo:margin-top="0cm" fo:margin-bottom="0cm" table:align="left" style:writing-mode="page"/>
    </style:style>
    <style:style style:name="表格8.A" style:family="table-column">
      <style:table-column-properties style:column-width="17.12cm" style:rel-column-width="65535*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ce8f5" fo:padding-left="0.459cm" fo:padding-right="0.459cm" fo:padding-top="0.282cm" fo:padding-bottom="0.282cm" fo:border="0.5pt solid #1f5c8b">
        <style:background-image/>
      </style:table-cell-properties>
    </style:style>
    <style:style style:name="表格9" style:family="table">
      <style:table-properties style:width="17.12cm" style:rel-width="100%" fo:margin-left="0.009cm" fo:margin-top="0cm" fo:margin-bottom="0cm" table:align="left" style:writing-mode="page"/>
    </style:style>
    <style:style style:name="表格9.A" style:family="table-column">
      <style:table-column-properties style:column-width="17.12cm" style:rel-column-width="65535*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88cm" fo:padding-right="0.388cm" fo:padding-top="0.282cm" fo:padding-bottom="0.282cm" fo:border="0.5pt solid #d9d9d9">
        <style:background-image/>
      </style:table-cell-properties>
    </style:style>
    <style:style style:name="表格10" style:family="table">
      <style:table-properties style:width="17.12cm" style:rel-width="100%" fo:margin-left="0.009cm" fo:margin-top="0cm" fo:margin-bottom="0cm" table:align="left" style:writing-mode="page"/>
    </style:style>
    <style:style style:name="表格10.A" style:family="table-column">
      <style:table-column-properties style:column-width="17.12cm" style:rel-column-width="65535*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2f2f2" fo:padding-left="0.388cm" fo:padding-right="0.388cm" fo:padding-top="0.282cm" fo:padding-bottom="0.282cm" fo:border="0.5pt solid #d9d9d9">
        <style:background-image/>
      </style:table-cell-properties>
    </style:style>
    <style:style style:name="表格11" style:family="table">
      <style:table-properties style:width="17.12cm" style:rel-width="100%" fo:margin-left="0.009cm" fo:margin-top="0cm" fo:margin-bottom="0cm" table:align="left" style:writing-mode="page"/>
    </style:style>
    <style:style style:name="表格11.A" style:family="table-column">
      <style:table-column-properties style:column-width="17.12cm" style:rel-column-width="65535*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be1e1" fo:padding-left="0.459cm" fo:padding-right="0.459cm" fo:padding-top="0.282cm" fo:padding-bottom="0.282cm" fo:border="0.5pt solid #b02a2a">
        <style:background-image/>
      </style:table-cell-properties>
    </style:style>
    <style:style style:name="表格12" style:family="table">
      <style:table-properties style:width="17.12cm" style:rel-width="100%" fo:margin-left="0.009cm" fo:margin-top="0cm" fo:margin-bottom="0cm" table:align="left" style:writing-mode="page"/>
    </style:style>
    <style:style style:name="表格12.A" style:family="table-column">
      <style:table-column-properties style:column-width="17.12cm" style:rel-column-width="65535*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a5f" fo:padding-left="0.353cm" fo:padding-right="0.353cm" fo:padding-top="0.176cm" fo:padding-bottom="0.176cm" fo:border-left="0.5pt solid #1f3a5f" fo:border-right="0.5pt solid #1f3a5f" fo:border-top="0.5pt solid #1f3a5f" fo:border-bottom="0.5pt solid #000000">
        <style:background-image/>
      </style:table-cell-properties>
    </style:style>
    <style:style style:name="表格12.A2" style:family="table-cell">
      <style:table-cell-properties fo:background-color="#fbf1dd" fo:padding-left="0.459cm" fo:padding-right="0.459cm" fo:padding-top="0.318cm" fo:padding-bottom="0.318cm" fo:border-left="0.5pt solid #1f3a5f" fo:border-right="0.5pt solid #1f3a5f" fo:border-top="0.5pt solid #000000" fo:border-bottom="0.5pt solid #1f3a5f">
        <style:background-image/>
      </style:table-cell-properties>
    </style:style>
    <style:style style:name="表格13" style:family="table">
      <style:table-properties style:width="17.12cm" style:rel-width="100%" fo:margin-left="0.009cm" fo:margin-top="0cm" fo:margin-bottom="0cm" table:align="left" style:writing-mode="page"/>
    </style:style>
    <style:style style:name="表格13.A" style:family="table-column">
      <style:table-column-properties style:column-width="17.12cm" style:rel-column-width="65535*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388cm" fo:padding-right="0.388cm" fo:padding-top="0.282cm" fo:padding-bottom="0.282cm" fo:border="0.5pt solid #d9d9d9">
        <style:background-image/>
      </style:table-cell-properties>
    </style:style>
    <style:style style:name="表格14" style:family="table">
      <style:table-properties style:width="17.12cm" style:rel-width="100%" fo:margin-left="0.009cm" fo:margin-top="0cm" fo:margin-bottom="0cm" table:align="left" style:writing-mode="page"/>
    </style:style>
    <style:style style:name="表格14.A" style:family="table-column">
      <style:table-column-properties style:column-width="17.12cm" style:rel-column-width="65535*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e3f3e6" fo:padding-left="0.459cm" fo:padding-right="0.459cm" fo:padding-top="0.282cm" fo:padding-bottom="0.282cm" fo:border="0.5pt solid #1e7a34">
        <style:background-image/>
      </style:table-cell-properties>
    </style:style>
    <style:style style:name="表格15" style:family="table">
      <style:table-properties style:width="17.12cm" style:rel-width="100%" fo:margin-left="0.009cm" fo:margin-top="0cm" fo:margin-bottom="0cm" table:align="left" style:writing-mode="page"/>
    </style:style>
    <style:style style:name="表格15.A" style:family="table-column">
      <style:table-column-properties style:column-width="5.523cm" style:rel-column-width="21141*"/>
    </style:style>
    <style:style style:name="表格15.B" style:family="table-column">
      <style:table-column-properties style:column-width="11.598cm" style:rel-column-width="44394*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f" fo:padding-left="0.282cm" fo:padding-right="0.282cm" fo:padding-top="0.212cm" fo:padding-bottom="0.212cm" fo:border-left="0.5pt solid #1f3a5f" fo:border-right="0.5pt solid #000000" fo:border-top="0.5pt solid #1f3a5f" fo:border-bottom="0.5pt solid #000000">
        <style:background-image/>
      </style:table-cell-properties>
    </style:style>
    <style:style style:name="表格15.B1" style:family="table-cell">
      <style:table-cell-properties style:vertical-align="middle" fo:background-color="#1f3a5f" fo:padding-left="0.282cm" fo:padding-right="0.282cm" fo:padding-top="0.212cm" fo:padding-bottom="0.212cm" fo:border-left="0.5pt solid #000000" fo:border-right="0.5pt solid #1f3a5f" fo:border-top="0.5pt solid #1f3a5f" fo:border-bottom="0.5pt solid #000000">
        <style:background-image/>
      </style:table-cell-properties>
    </style:style>
    <style:style style:name="表格15.A2" style:family="table-cell">
      <style:table-cell-properties style:vertical-align="middle" fo:background-color="#fbf1dd" fo:padding-left="0.282cm" fo:padding-right="0.282cm" fo:padding-top="0.212cm" fo:padding-bottom="0.212cm" fo:border-left="0.5pt solid #1f3a5f" fo:border-right="0.5pt solid #000000" fo:border-top="0.5pt solid #000000" fo:border-bottom="0.5pt solid #000000">
        <style:background-image/>
      </style:table-cell-properties>
    </style:style>
    <style:style style:name="表格15.B2" style:family="table-cell">
      <style:table-cell-properties style:vertical-align="middle" fo:background-color="#ffffff" fo:padding-left="0.282cm" fo:padding-right="0.282cm" fo:padding-top="0.212cm" fo:padding-bottom="0.212cm" fo:border-left="0.5pt solid #000000" fo:border-right="0.5pt solid #1f3a5f" fo:border-top="0.5pt solid #000000" fo:border-bottom="0.5pt solid #000000">
        <style:background-image/>
      </style:table-cell-properties>
    </style:style>
    <style:style style:name="表格15.A3" style:family="table-cell">
      <style:table-cell-properties style:vertical-align="middle" fo:background-color="#fbf1dd" fo:padding-left="0.282cm" fo:padding-right="0.282cm" fo:padding-top="0.212cm" fo:padding-bottom="0.212cm" fo:border-left="0.5pt solid #1f3a5f" fo:border-right="0.5pt solid #000000" fo:border-top="0.5pt solid #000000" fo:border-bottom="0.5pt solid #1f3a5f">
        <style:background-image/>
      </style:table-cell-properties>
    </style:style>
    <style:style style:name="表格15.B3" style:family="table-cell">
      <style:table-cell-properties style:vertical-align="middle" fo:background-color="#ffffff" fo:padding-left="0.282cm" fo:padding-right="0.282cm" fo:padding-top="0.212cm" fo:padding-bottom="0.212cm" fo:border-left="0.5pt solid #000000" fo:border-right="0.5pt solid #1f3a5f" fo:border-top="0.5pt solid #000000" fo:border-bottom="0.5pt solid #1f3a5f">
        <style:background-image/>
      </style:table-cell-properties>
    </style:style>
    <style:style style:name="表格16" style:family="table">
      <style:table-properties style:width="17.12cm" style:rel-width="100%" fo:margin-left="0.009cm" fo:margin-top="0cm" fo:margin-bottom="0cm" table:align="left" style:writing-mode="page"/>
    </style:style>
    <style:style style:name="表格16.A" style:family="table-column">
      <style:table-column-properties style:column-width="17.12cm" style:rel-column-width="65535*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388cm" fo:padding-right="0.388cm" fo:padding-top="0.282cm" fo:padding-bottom="0.282cm" fo:border="0.5pt solid #d9d9d9">
        <style:background-image/>
      </style:table-cell-properties>
    </style:style>
    <style:style style:name="表格17" style:family="table">
      <style:table-properties style:width="17.12cm" style:rel-width="100%" fo:margin-left="0.009cm" fo:margin-top="0cm" fo:margin-bottom="0cm" table:align="left" style:writing-mode="page"/>
    </style:style>
    <style:style style:name="表格17.A" style:family="table-column">
      <style:table-column-properties style:column-width="17.12cm" style:rel-column-width="65535*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ce8f5" fo:padding-left="0.459cm" fo:padding-right="0.459cm" fo:padding-top="0.282cm" fo:padding-bottom="0.282cm" fo:border="0.5pt solid #1f5c8b">
        <style:background-image/>
      </style:table-cell-properties>
    </style:style>
    <style:style style:name="表格18" style:family="table">
      <style:table-properties style:width="17.12cm" style:rel-width="100%" fo:margin-left="0.009cm" fo:margin-top="0cm" fo:margin-bottom="0cm" table:align="left" style:writing-mode="page"/>
    </style:style>
    <style:style style:name="表格18.A" style:family="table-column">
      <style:table-column-properties style:column-width="17.12cm" style:rel-column-width="65535*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3f3e6" fo:padding-left="0.459cm" fo:padding-right="0.459cm" fo:padding-top="0.282cm" fo:padding-bottom="0.282cm" fo:border="0.5pt solid #1e7a34">
        <style:background-image/>
      </style:table-cell-properties>
    </style:style>
    <style:style style:name="表格19" style:family="table">
      <style:table-properties style:width="17.12cm" style:rel-width="100%" fo:margin-left="0.009cm" fo:margin-top="0cm" fo:margin-bottom="0cm" table:align="left" style:writing-mode="page"/>
    </style:style>
    <style:style style:name="表格19.A" style:family="table-column">
      <style:table-column-properties style:column-width="17.12cm" style:rel-column-width="65535*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3cd" fo:padding-left="0.459cm" fo:padding-right="0.459cm" fo:padding-top="0.282cm" fo:padding-bottom="0.282cm" fo:border="0.5pt solid #8a6d00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76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529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.159cm" style:contextual-spacing="false"/>
    </style:style>
    <style:style style:name="P5" style:family="paragraph" style:parent-style-name="Standard">
      <style:paragraph-properties fo:margin-top="0cm" fo:margin-bottom="0.141cm" style:contextual-spacing="false" fo:line-height="125%"/>
    </style:style>
    <style:style style:name="P6" style:family="paragraph" style:parent-style-name="Standard">
      <style:paragraph-properties fo:margin-top="0cm" fo:margin-bottom="0cm" style:contextual-spacing="false" fo:line-height="125%"/>
    </style:style>
    <style:style style:name="P7" style:family="paragraph" style:parent-style-name="Standard">
      <style:paragraph-properties fo:margin-top="0cm" fo:margin-bottom="0.353cm" style:contextual-spacing="false"/>
    </style:style>
    <style:style style:name="P8" style:family="paragraph" style:parent-style-name="Heading_20_1">
      <style:paragraph-properties fo:margin-top="0.706cm" fo:margin-bottom="0.353cm" style:contextual-spacing="false" fo:padding-left="0cm" fo:padding-right="0cm" fo:padding-top="0cm" fo:padding-bottom="0.212cm" fo:border-left="none" fo:border-right="none" fo:border-top="none" fo:border-bottom="1.5pt solid #d9760a"/>
    </style:style>
    <style:style style:name="P9" style:family="paragraph" style:parent-style-name="Standard">
      <style:paragraph-properties fo:margin-top="0cm" fo:margin-bottom="0.282cm" style:contextual-spacing="false" fo:line-height="133%"/>
    </style:style>
    <style:style style:name="P10" style:family="paragraph" style:parent-style-name="List_20_Paragraph" style:list-style-name="WWNum1">
      <style:paragraph-properties fo:margin-top="0cm" fo:margin-bottom="0.176cm" style:contextual-spacing="false" fo:line-height="125%"/>
    </style:style>
    <style:style style:name="P11" style:family="paragraph" style:parent-style-name="Standard">
      <style:paragraph-properties fo:margin-top="0cm" fo:margin-bottom="0.141cm" style:contextual-spacing="false"/>
    </style:style>
    <style:style style:name="P12" style:family="paragraph" style:parent-style-name="Standard">
      <style:paragraph-properties fo:margin-top="0cm" fo:margin-bottom="0.106cm" style:contextual-spacing="false"/>
    </style:style>
    <style:style style:name="P13" style:family="paragraph" style:parent-style-name="Standard">
      <style:paragraph-properties fo:margin-top="0cm" fo:margin-bottom="0.176cm" style:contextual-spacing="false"/>
    </style:style>
    <style:style style:name="P14" style:family="paragraph" style:parent-style-name="Standard">
      <style:paragraph-properties fo:margin-top="0cm" fo:margin-bottom="0.282cm" style:contextual-spacing="false"/>
    </style:style>
    <style:style style:name="P15" style:family="paragraph" style:parent-style-name="Standard">
      <style:paragraph-properties fo:margin-top="0cm" fo:margin-bottom="0.282cm" style:contextual-spacing="false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/>
    </style:style>
    <style:style style:name="P17" style:family="paragraph" style:parent-style-name="Standard">
      <style:paragraph-properties fo:margin-top="0cm" fo:margin-bottom="0.212cm" style:contextual-spacing="false"/>
    </style:style>
    <style:style style:name="P18" style:family="paragraph" style:parent-style-name="Standard">
      <style:paragraph-properties fo:margin-top="0cm" fo:margin-bottom="0.247cm" style:contextual-spacing="false"/>
    </style:style>
    <style:style style:name="T1" style:family="text">
      <style:text-properties fo:color="#d9760a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T2" style:family="text">
      <style:text-properties fo:color="#1f3a5f" loext:opacity="100%" style:font-name="Microsoft JhengHei" fo:font-size="22pt" fo:font-weight="bold" style:font-name-asian="Microsoft JhengHei1" style:font-size-asian="22pt" style:font-weight-asian="bold" style:font-name-complex="Microsoft JhengHei1" style:font-size-complex="22pt" style:font-weight-complex="bold"/>
    </style:style>
    <style:style style:name="T3" style:family="text">
      <style:text-properties fo:color="#666666" loext:opacity="100%" style:font-name="Microsoft JhengHei" fo:font-size="11pt" fo:font-style="italic" style:font-name-asian="Microsoft JhengHei1" style:font-size-asian="11pt" style:font-style-asian="italic" style:font-name-complex="Microsoft JhengHei1" style:font-size-complex="11pt" style:font-style-complex="italic"/>
    </style:style>
    <style:style style:name="T4" style:family="text">
      <style:text-properties fo:color="#1e7a34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5" style:family="text">
      <style:text-properties fo:color="#222222" loext:opacity="100%" style:font-name="Microsoft JhengHei" fo:font-size="11pt" style:font-name-asian="Microsoft JhengHei1" style:font-size-asian="11pt" style:font-name-complex="Microsoft JhengHei1" style:font-size-complex="11pt"/>
    </style:style>
    <style:style style:name="T6" style:family="text">
      <style:text-properties fo:color="#1e7a34" loext:opacity="100%" fo:font-family="Consolas" style:font-family-generic="roman" style:font-pitch="variable" fo:font-size="11pt" fo:font-weight="bold" style:font-family-asian="Consolas" style:font-family-generic-asian="system" style:font-pitch-asian="variable" style:font-size-asian="11pt" style:font-weight-asian="bold" style:font-family-complex="Consolas" style:font-family-generic-complex="system" style:font-pitch-complex="variable" style:font-size-complex="11pt" style:font-weight-complex="bold"/>
    </style:style>
    <style:style style:name="T7" style:family="text">
      <style:text-properties fo:color="#1e7a34" loext:opacity="100%" fo:font-family="Consolas" style:font-family-generic="roman" style:font-pitch="variable" fo:font-size="11.5pt" fo:font-weight="bold" style:font-family-asian="Consolas" style:font-family-generic-asian="system" style:font-pitch-asian="variable" style:font-size-asian="11.5pt" style:font-weight-asian="bold" style:font-family-complex="Consolas" style:font-family-generic-complex="system" style:font-pitch-complex="variable" style:font-size-complex="11.5pt" style:font-weight-complex="bold"/>
    </style:style>
    <style:style style:name="T8" style:family="text">
      <style:text-properties fo:color="#1f3a5f" loext:opacity="100%" style:font-name="Microsoft JhengHei" fo:font-size="16pt" fo:font-weight="bold" style:font-name-asian="Microsoft JhengHei1" style:font-size-asian="16pt" style:font-weight-asian="bold" style:font-name-complex="Microsoft JhengHei1" style:font-size-complex="16pt" style:font-weight-complex="bold"/>
    </style:style>
    <style:style style:name="T9" style:family="text">
      <style:text-properties fo:color="#1f3a5f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10" style:family="text">
      <style:text-properties fo:color="#ffffff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11" style:family="text">
      <style:text-properties fo:color="#1f3a5f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T12" style:family="text">
      <style:text-properties fo:color="#222222" loext:opacity="100%" fo:font-family="Consolas" style:font-family-generic="roman" style:font-pitch="variable" fo:font-size="11pt" style:font-family-asian="Consolas" style:font-family-generic-asian="system" style:font-pitch-asian="variable" style:font-size-asian="11pt" style:font-family-complex="Consolas" style:font-family-generic-complex="system" style:font-pitch-complex="variable" style:font-size-complex="11pt"/>
    </style:style>
    <style:style style:name="T13" style:family="text">
      <style:text-properties fo:color="#b02a2a" loext:opacity="100%" fo:font-family="Consolas" style:font-family-generic="roman" style:font-pitch="variable" fo:font-size="11pt" fo:font-weight="bold" style:font-family-asian="Consolas" style:font-family-generic-asian="system" style:font-pitch-asian="variable" style:font-size-asian="11pt" style:font-weight-asian="bold" style:font-family-complex="Consolas" style:font-family-generic-complex="system" style:font-pitch-complex="variable" style:font-size-complex="11pt" style:font-weight-complex="bold"/>
    </style:style>
    <style:style style:name="T14" style:family="text">
      <style:text-properties fo:color="#8a6d00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15" style:family="text">
      <style:text-properties fo:color="#333333" loext:opacity="100%" fo:font-family="Consolas" style:font-family-generic="roman" style:font-pitch="variable" fo:font-size="10.5pt" style:font-family-asian="Consolas" style:font-family-generic-asian="system" style:font-pitch-asian="variable" style:font-size-asian="10.5pt" style:font-family-complex="Consolas" style:font-family-generic-complex="system" style:font-pitch-complex="variable" style:font-size-complex="10.5pt"/>
    </style:style>
    <style:style style:name="T16" style:family="text">
      <style:text-properties fo:color="#1f5c8b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17" style:family="text">
      <style:text-properties fo:color="#b02a2a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18" style:family="text">
      <style:text-properties fo:color="#222222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19" style:family="text">
      <style:text-properties fo:color="#ffffff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T20" style:family="text">
      <style:text-properties fo:color="#1f3a5f" loext:opacity="100%" fo:font-family="Consolas" style:font-family-generic="roman" style:font-pitch="variable" fo:font-size="10pt" fo:font-weight="bold" style:font-family-asian="Consolas" style:font-family-generic-asian="system" style:font-pitch-asian="variable" style:font-size-asian="10pt" style:font-weight-asian="bold" style:font-family-complex="Consolas" style:font-family-generic-complex="system" style:font-pitch-complex="variable" style:font-size-complex="10pt" style:font-weight-complex="bold"/>
    </style:style>
    <style:style style:name="T21" style:family="text"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T22" style:family="text">
      <style:text-properties fo:color="#1f5c8b" loext:opacity="100%" fo:font-family="Consolas" style:font-family-generic="roman" style:font-pitch="variable" fo:font-size="11pt" fo:font-weight="bold" style:font-family-asian="Consolas" style:font-family-generic-asian="system" style:font-pitch-asian="variable" style:font-size-asian="11pt" style:font-weight-asian="bold" style:font-family-complex="Consolas" style:font-family-generic-complex="system" style:font-pitch-complex="variable" style:font-size-complex="11pt" style:font-weight-complex="bold"/>
    </style:style>
    <style:style style:name="T23" style:family="text">
      <style:text-properties fo:color="#8a6d00" loext:opacity="100%" fo:font-family="Consolas" style:font-family-generic="roman" style:font-pitch="variable" fo:font-size="11pt" fo:font-weight="bold" style:font-family-asian="Consolas" style:font-family-generic-asian="system" style:font-pitch-asian="variable" style:font-size-asian="11pt" style:font-weight-asian="bold" style:font-family-complex="Consolas" style:font-family-generic-complex="system" style:font-pitch-complex="variable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考科：作業系統 / Linux</text:span></text:p>
      <text:p text:style-name="P2"><text:span text:style-name="T2">Shebang（#!）機制完整解析</text:span></text:p>
      <text:p text:style-name="P3"><text:span text:style-name="T3">從「Linux 到底在幫我做什麼」一路講到經典考古題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4"><text:span text:style-name="T4">💡 一句話結論（先記住這句，後面都是在證明它）</text:span></text:p>
            <text:p text:style-name="P5"><text:span text:style-name="T5">執行 </text:span><text:span text:style-name="T6">./script.sh arg1 arg2</text:span><text:span text:style-name="T5"> 時，Linux 會先讀第一行 #!，然後把整個指令「翻譯」成：</text:span></text:p>
            <text:p text:style-name="P6"><text:span text:style-name="T7">解譯器 <text:s/>script.sh <text:s/>arg1 <text:s/>arg2</text:span></text:p>
          </table:table-cell>
        </table:table-row>
      </table:table>
      <text:p text:style-name="P7"/>
      <text:p text:style-name="P8"><text:span text:style-name="T8">一、核心公式：Linux 到底做了什麼翻譯？</text:span></text:p>
      <text:p text:style-name="P9"><text:span text:style-name="T5">這一整頁筆記，其實只是在證明一件事：不管 #! 後面接的是 bash、python3，還是 cat、echo，Linux 的處理方式永遠是同一套規則，從不例外。</text:span></text:p>
      <text:list text:style-name="WWNum1">
        <text:list-item text:start-value="1">
          <text:p text:style-name="P10"><text:span text:style-name="T5">第一行是 #!/bin/bash → Linux 偷偷變成 bash script.sh</text:span></text:p>
        </text:list-item>
        <text:list-item>
          <text:p text:style-name="P10"><text:span text:style-name="T5">第一行是 #!/usr/bin/python3 → Linux 偷偷變成 python3 script.py</text:span></text:p>
        </text:list-item>
        <text:list-item>
          <text:p text:style-name="P10"><text:span text:style-name="T5">第一行是 #!/bin/cat → Linux 偷偷變成 cat script.sh</text:span></text:p>
        </text:list-item>
      </text:list>
      <text:p text:style-name="P11"/>
      <text:p text:style-name="P9"><text:span text:style-name="T9">把它們統整成一個固定公式：</text:span></text:p>
      <text:p text:style-name="P12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Standard"><text:span text:style-name="T10">固定公式</text:span></text:p>
          </table:table-cell>
        </table:table-row>
        <table:table-row table:style-name="表格2.1">
          <table:table-cell table:style-name="表格2.A2" office:value-type="string">
            <text:p text:style-name="P13"><text:span text:style-name="T11">你輸入：</text:span></text:p>
            <text:p text:style-name="P14"><text:span text:style-name="T12">./script.sh <text:s/>A <text:s/>B <text:s/>C</text:span></text:p>
            <text:p text:style-name="P15"><text:span text:style-name="T1">⬇ <text:s/>Linux 讀到第一行 #! 之後，等價於執行 <text:s/>⬇</text:span></text:p>
            <text:p text:style-name="P16"><text:span text:style-name="T11">Linux 實際執行：</text:span></text:p>
            <text:p text:style-name="P16"><text:span text:style-name="T13">/xxx/yyy <text:s/>script.sh <text:s/>A <text:s/>B <text:s/>C</text:span></text:p>
          </table:table-cell>
        </table:table-row>
      </table:table>
      <text:p text:style-name="P17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"><text:span text:style-name="T14">⭐ 考點：第一個參數永遠是「腳本自己的檔名」</text:span></text:p>
            <text:p text:style-name="P6"><text:span text:style-name="T5">不管你原本打了幾個參數，Linux 塞給解譯器的第一個參數，一定是 script 自己的路徑／檔</text:span><text:soft-page-break/><text:span text:style-name="T5">名，接著才是你原本輸入的參數。這就是後面 #!/bin/echo 範例會出現「意外」輸出的原因。</text:span></text:p>
          </table:table-cell>
        </table:table-row>
      </table:table>
      <text:p text:style-name="P8"><text:span text:style-name="T8">二、範例一：#!/bin/cat（書上原題）</text:span></text:p>
      <text:p text:style-name="P9"><text:span text:style-name="T5">假設 catmyself.sh 的內容是：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2"><text:span text:style-name="T15">#!/bin/cat</text:span></text:p>
            <text:p text:style-name="P16"><text:span text:style-name="T15">echo "myself"</text:span></text:p>
          </table:table-cell>
        </table:table-row>
      </table:table>
      <text:p text:style-name="P13"/>
      <text:p text:style-name="P9"><text:span text:style-name="T5">執行：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6"><text:span text:style-name="T15">./catmyself.sh helloworld.sh</text:span></text:p>
          </table:table-cell>
        </table:table-row>
      </table:table>
      <text:p text:style-name="P13"/>
      <text:p text:style-name="P9"><text:span text:style-name="T5">依照上面的固定公式，Linux 讀到 #!/bin/cat 之後，實際執行的是：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6"><text:span text:style-name="T15">cat catmyself.sh helloworld.sh</text:span></text:p>
          </table:table-cell>
        </table:table-row>
      </table:table>
      <text:p text:style-name="P13"/>
      <text:p text:style-name="P9"><text:span text:style-name="T5">而 cat A B 的意義，你早就知道了——「印出 A 的內容，再印出 B 的內容」。所以結果自然就是先印出 catmyself.sh 全部內容，再印出 helloworld.sh 全部內容：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2"><text:span text:style-name="T15">#!/bin/cat</text:span></text:p>
            <text:p text:style-name="P12"><text:span text:style-name="T15">echo "myself"</text:span></text:p>
            <text:p text:style-name="P12"/>
            <text:p text:style-name="P12"><text:span text:style-name="T15">#!/bin/bash</text:span></text:p>
            <text:p text:style-name="P12"><text:span text:style-name="T15">STR="hello world"</text:span></text:p>
            <text:p text:style-name="P16"><text:span text:style-name="T15">echo $STR</text:span></text:p>
          </table:table-cell>
        </table:table-row>
      </table:table>
      <text:p text:style-name="P13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4"><text:span text:style-name="T16">🔍 作者真正想證明的事</text:span></text:p>
            <text:p text:style-name="P6"><text:span text:style-name="T5">Linux 從頭到尾都沒有「執行」echo "myself" 這一行。它根本沒有把 catmyself.sh 當成程式在跑，只是把它整個當成「文字檔」，交給 cat 去讀而已。這正是 shebang 機制的本質：#! 決定的是「誰來處理這個檔案」，而不是「這個檔案裡的指令會被執行」。</text:span></text:p>
          </table:table-cell>
        </table:table-row>
      </table:table>
      <text:p text:style-name="P8"><text:soft-page-break/><text:span text:style-name="T8">三、經典考題：#!/bin/echo（最容易答錯的地方）</text:span></text:p>
      <text:p text:style-name="P9"><text:span text:style-name="T5">這是本章最重要的陷阱題。test.sh 的內容是：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6"><text:span text:style-name="T15">#!/bin/echo</text:span></text:p>
          </table:table-cell>
        </table:table-row>
      </table:table>
      <text:p text:style-name="P13"/>
      <text:p text:style-name="P9"><text:span text:style-name="T5">執行：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6"><text:span text:style-name="T15">./test.sh hello</text:span></text:p>
          </table:table-cell>
        </table:table-row>
      </table:table>
      <text:p text:style-name="P17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"><text:span text:style-name="T17">❌ 直覺但錯誤的答案</text:span></text:p>
            <text:p text:style-name="P6"><text:span text:style-name="T5">很多人直覺會回答輸出 </text:span><text:span text:style-name="T13">hello</text:span><text:span text:style-name="T5">，以為 Linux 只是單純把 hello 這個參數轉交給 echo。這個答案漏掉了「腳本自己的檔名也會被塞進去」這件事。</text:span></text:p>
          </table:table-cell>
        </table:table-row>
      </table:table>
      <text:p text:style-name="P18"/>
      <text:p text:style-name="P9"><text:span text:style-name="T9">套用固定公式重新推導一次：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Standard"><text:span text:style-name="T10">代入公式</text:span></text:p>
          </table:table-cell>
        </table:table-row>
        <table:table-row table:style-name="表格12.1">
          <table:table-cell table:style-name="表格12.A2" office:value-type="string">
            <text:p text:style-name="P13"><text:span text:style-name="T11">你輸入：</text:span></text:p>
            <text:p text:style-name="P14"><text:span text:style-name="T12">./test.sh <text:s/>hello</text:span></text:p>
            <text:p text:style-name="P15"><text:span text:style-name="T1">⬇ <text:s/>Linux 讀到第一行 #! 之後，等價於執行 <text:s/>⬇</text:span></text:p>
            <text:p text:style-name="P16"><text:span text:style-name="T11">Linux 實際執行：</text:span></text:p>
            <text:p text:style-name="P16"><text:span text:style-name="T13">/bin/echo <text:s/>test.sh <text:s/>hello</text:span></text:p>
          </table:table-cell>
        </table:table-row>
      </table:table>
      <text:p text:style-name="P17"/>
      <text:p text:style-name="P9"><text:span text:style-name="T18">echo 收到的參數其實有兩個：</text:span></text:p>
      <text:list text:continue-numbering="true" text:style-name="WWNum1">
        <text:list-item>
          <text:p text:style-name="P10"><text:span text:style-name="T5">第 1 個參數：test.sh（腳本自己的檔名，Linux 自動加上去的）</text:span></text:p>
        </text:list-item>
        <text:list-item>
          <text:p text:style-name="P10"><text:span text:style-name="T5">第 2 個參數：hello（你原本打的參數）</text:span></text:p>
        </text:list-item>
      </text:list>
      <text:p text:style-name="P11"/>
      <text:p text:style-name="P9"><text:span text:style-name="T5">所以正確輸出是：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6"><text:span text:style-name="T15">test.sh hello</text:span></text:p>
          </table:table-cell>
        </table:table-row>
      </table:table>
      <text:p text:style-name="P17"/>
      <table:table table:name="表格14" table:style-name="表格14">
        <table:table-column table:style-name="表格14.A"/>
        <text:soft-page-break/>
        <table:table-row table:style-name="表格14.1">
          <table:table-cell table:style-name="表格14.A1" office:value-type="string">
            <text:p text:style-name="P4"><text:span text:style-name="T4">✅ 正確答案 &amp; 記憶方式</text:span></text:p>
            <text:p text:style-name="P6"><text:span text:style-name="T5">輸出是 </text:span><text:span text:style-name="T6">test.sh hello</text:span><text:span text:style-name="T5">，不是 hello。只要記住固定公式「解譯器 script.sh arg1 arg2…」，腳本檔名永遠排在第一個參數的位置，這類考題就不會再答錯。</text:span></text:p>
          </table:table-cell>
        </table:table-row>
      </table:table>
      <text:p text:style-name="P8"><text:span text:style-name="T8">四、chmod +x 跟 #! 是兩回事</text:span></text:p>
      <text:p text:style-name="P9"><text:span text:style-name="T5">這是另一個很多人會混在一起的觀念。兩者各自負責不同的工作，而且缺一不可。</text:span></text:p>
      <text:p text:style-name="P11"/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Standard"><text:span text:style-name="T19">項目</text:span></text:p>
          </table:table-cell>
          <table:table-cell table:style-name="表格15.B1" office:value-type="string">
            <text:p text:style-name="Standard"><text:span text:style-name="T19">作用</text:span></text:p>
          </table:table-cell>
        </table:table-row>
        <table:table-row table:style-name="表格15.1">
          <table:table-cell table:style-name="表格15.A2" office:value-type="string">
            <text:p text:style-name="Standard"><text:span text:style-name="T20">chmod +x</text:span></text:p>
          </table:table-cell>
          <table:table-cell table:style-name="表格15.B2" office:value-type="string">
            <text:p text:style-name="Standard"><text:span text:style-name="T21">允許這個檔案被當成「程式」執行（賦予執行權限）。少了它，Linux 連開始都不會開始，直接回應 Permission denied。</text:span></text:p>
          </table:table-cell>
        </table:table-row>
        <table:table-row table:style-name="表格15.1">
          <table:table-cell table:style-name="表格15.A3" office:value-type="string">
            <text:p text:style-name="Standard"><text:span text:style-name="T20">#!（shebang）</text:span></text:p>
          </table:table-cell>
          <table:table-cell table:style-name="表格15.B3" office:value-type="string">
            <text:p text:style-name="Standard"><text:span text:style-name="T21">告訴 Linux「要交給哪個解譯器來處理」。決定的是誰來讀這個檔案，不是有沒有權限執行。</text:span></text:p>
          </table:table-cell>
        </table:table-row>
      </table:table>
      <text:p text:style-name="P14"/>
      <text:p text:style-name="P9"><text:span text:style-name="T9">完整流程圖：</text:span></text:p>
      <text:p text:style-name="P12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2"><text:span text:style-name="T15">chmod +x catmyself.sh</text:span></text:p>
            <text:p text:style-name="P12"><text:span text:style-name="T15"><text:s text:c="8"/>│</text:span></text:p>
            <text:p text:style-name="P12"><text:span text:style-name="T15"><text:s text:c="8"/>▼ <text:s text:c="2"/>給予「可執行」權限</text:span></text:p>
            <text:p text:style-name="P12"><text:span text:style-name="T15">./catmyself.sh helloworld.sh</text:span></text:p>
            <text:p text:style-name="P12"><text:span text:style-name="T15"><text:s text:c="8"/>│</text:span></text:p>
            <text:p text:style-name="P12"><text:span text:style-name="T15"><text:s text:c="8"/>▼ <text:s text:c="2"/>Linux 檢查：有 x 權限嗎？</text:span></text:p>
            <text:p text:style-name="P12"><text:span text:style-name="T15"><text:s text:c="7"/>有 → 讀第一行 #!</text:span></text:p>
            <text:p text:style-name="P12"><text:span text:style-name="T15"><text:s text:c="8"/>│</text:span></text:p>
            <text:p text:style-name="P12"><text:span text:style-name="T15"><text:s text:c="8"/>▼</text:span></text:p>
            <text:p text:style-name="P16"><text:span text:style-name="T15">/bin/cat catmyself.sh helloworld.sh</text:span></text:p>
          </table:table-cell>
        </table:table-row>
      </table:table>
      <text:p text:style-name="P18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"><text:span text:style-name="T16">💡 補充：不想 chmod +x 也可以執行</text:span></text:p>
            <text:p text:style-name="P6"><text:span text:style-name="T5">直接輸入 </text:span><text:span text:style-name="T22">cat catmyself.sh</text:span><text:span text:style-name="T5"> 或 </text:span><text:span text:style-name="T22">bash catmyself.sh</text:span><text:span text:style-name="T5"> 都不需要 chmod +x。因為此時你「執行」的是 cat 或 bash 這個程式本身，catmyself.sh 只是它們讀取的輸入檔案，不需要自己具備執行權限。</text:span></text:p>
          </table:table-cell>
        </table:table-row>
      </table:table>
      <text:p text:style-name="P8"><text:soft-page-break/><text:span text:style-name="T8">五、總結口訣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4"><text:span text:style-name="T4">🧠 一句話分清楚 chmod +x 與 #!</text:span></text:p>
            <text:p text:style-name="P5"><text:span text:style-name="T6">chmod +x</text:span><text:span text:style-name="T5">：允許這個檔案「被當成程式執行」。</text:span></text:p>
            <text:p text:style-name="P5"><text:span text:style-name="T6">#!</text:span><text:span text:style-name="T5">：告訴 Linux「要用哪個程式來執行它」。</text:span></text:p>
            <text:p text:style-name="P6"><text:span text:style-name="T18">兩者缺一不可：沒有 x 權限，Linux 根本不會開始執行；沒有 #!，Linux 就不知道該交給哪個解譯器處理。</text:span></text:p>
          </table:table-cell>
        </table:table-row>
      </table:table>
      <text:p text:style-name="P14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4"><text:span text:style-name="T14">🧠 一句話記住整章：固定公式</text:span></text:p>
            <text:p text:style-name="P5"><text:span text:style-name="T23">./script.sh <text:s/>A <text:s/>B <text:s/>C</text:span><text:span text:style-name="T5"> <text:s/>永遠等價於 <text:s/></text:span><text:span text:style-name="T23">解譯器 <text:s/>script.sh <text:s/>A <text:s/>B <text:s/>C</text:span></text:p>
            <text:p text:style-name="Standard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22222" loext:opacity="100%" style:font-name="Microsoft JhengHei" fo:font-size="11pt" fo:language="en" fo:country="US" style:letter-kerning="false" style:font-name-asian="Microsoft JhengHei1" style:font-size-asian="11pt" style:language-asian="zh" style:country-asian="TW" style:font-name-complex="Microsoft JhengHe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222222" loext:opacity="100%" style:font-name="Microsoft JhengHei" fo:font-size="11pt" fo:language="en" fo:country="US" style:letter-kerning="false" style:font-name-asian="Microsoft JhengHei1" style:font-size-asian="11pt" style:language-asian="zh" style:country-asian="TW" style:font-name-complex="Microsoft JhengHe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right" style:justify-single-word="false" fo:padding-left="0cm" fo:padding-right="0cm" fo:padding-top="0cm" fo:padding-bottom="0.141cm" fo:border-left="none" fo:border-right="none" fo:border-top="none" fo:border-bottom="0.51pt solid #cccccc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888888" loext:opacity="100%" style:font-name="Microsoft JhengHei" fo:font-size="8pt" style:font-name-asian="Microsoft JhengHei1" style:font-size-asian="8pt" style:font-name-complex="Microsoft JhengHei1" style:font-size-complex="8pt"/>
    </style:style>
    <style:style style:name="MT2" style:family="text">
      <style:text-properties fo:color="#999999" loext:opacity="100%" style:font-name="Microsoft JhengHei" fo:font-size="8pt" style:font-name-asian="Microsoft JhengHei1" style:font-size-asian="8pt" style:font-name-complex="Microsoft JhengHei1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1.94cm" fo:margin-right="1.9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15cm" fo:margin-left="0cm" fo:margin-right="0cm" fo:margin-bottom="0.415cm" style:dynamic-spacing="true"/>
      </style:header-style>
      <style:footer-style>
        <style:header-footer-properties fo:min-height="0.515cm" fo:margin-left="0cm" fo:margin-right="0cm" fo:margin-top="0.4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hebang（#!）機制完整解析</text:span></text:p>
      </style:header>
      <style:footer>
        <text:p text:style-name="MP2"><text:span text:style-name="MT2">第 </text:span><text:page-number text:select-page="current">5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7-10T03:02:57.884000000</meta:creation-date>
    <dc:date>2026-07-10T03:02:57.899000000</dc:date>
    <meta:document-statistic meta:table-count="19" meta:image-count="0" meta:object-count="0" meta:page-count="5" meta:paragraph-count="87" meta:word-count="1272" meta:character-count="2333" meta:non-whitespace-character-count="2060"/>
    <meta:generator>LibreOffice/26.2.4.2$Windows_X86_64 LibreOffice_project/0229ac93fcf0d7cbc6376066c6f35021cef002dc</meta:generator>
  </office:meta>
</office:document-meta>
</file>