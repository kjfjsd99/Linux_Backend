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表格1" style:family="table">
      <style:table-properties style:width="16.768cm" style:rel-width="100%" fo:margin-left="0.012cm" fo:margin-top="0cm" fo:margin-bottom="0cm" table:align="left" style:writing-mode="page"/>
    </style:style>
    <style:style style:name="表格1.A" style:family="table-column">
      <style:table-column-properties style:column-width="16.768cm" style:rel-column-width="65535*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f2f2f2" fo:padding-left="0.441cm" fo:padding-right="0.441cm" fo:padding-top="0.265cm" fo:padding-bottom="0.265cm" fo:border="0.75pt solid #8c8c8c">
        <style:background-image/>
      </style:table-cell-properties>
    </style:style>
    <style:style style:name="表格2" style:family="table">
      <style:table-properties style:width="16.768cm" style:rel-width="100%" fo:margin-left="0.018cm" fo:margin-top="0cm" fo:margin-bottom="0cm" table:align="left" style:writing-mode="page"/>
    </style:style>
    <style:style style:name="表格2.A" style:family="table-column">
      <style:table-column-properties style:column-width="16.768cm" style:rel-column-width="65535*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e8f0fe" fo:padding-left="0.353cm" fo:padding-right="0.353cm" fo:padding-top="0.265cm" fo:padding-bottom="0.265cm" fo:border="1pt solid #1a56db">
        <style:background-image/>
      </style:table-cell-properties>
    </style:style>
    <style:style style:name="表格3" style:family="table">
      <style:table-properties style:width="16.768cm" style:rel-width="100%" fo:margin-left="0.012cm" fo:margin-top="0cm" fo:margin-bottom="0cm" table:align="left" style:writing-mode="page"/>
    </style:style>
    <style:style style:name="表格3.A" style:family="table-column">
      <style:table-column-properties style:column-width="16.768cm" style:rel-column-width="65535*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f2f2f2" fo:padding-left="0.441cm" fo:padding-right="0.441cm" fo:padding-top="0.265cm" fo:padding-bottom="0.265cm" fo:border="0.75pt solid #8c8c8c">
        <style:background-image/>
      </style:table-cell-properties>
    </style:style>
    <style:style style:name="表格4" style:family="table">
      <style:table-properties style:width="16.768cm" style:rel-width="100%" fo:margin-left="0.018cm" fo:margin-top="0cm" fo:margin-bottom="0cm" table:align="left" style:writing-mode="page"/>
    </style:style>
    <style:style style:name="表格4.A" style:family="table-column">
      <style:table-column-properties style:column-width="16.768cm" style:rel-column-width="65535*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e8f0fe" fo:padding-left="0.353cm" fo:padding-right="0.353cm" fo:padding-top="0.265cm" fo:padding-bottom="0.265cm" fo:border="1pt solid #1a56db">
        <style:background-image/>
      </style:table-cell-properties>
    </style:style>
    <style:style style:name="表格5" style:family="table">
      <style:table-properties style:width="16.768cm" style:rel-width="100%" fo:margin-left="0.012cm" fo:margin-top="0cm" fo:margin-bottom="0cm" table:align="left" style:writing-mode="page"/>
    </style:style>
    <style:style style:name="表格5.A" style:family="table-column">
      <style:table-column-properties style:column-width="16.768cm" style:rel-column-width="65535*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2f2f2" fo:padding-left="0.441cm" fo:padding-right="0.441cm" fo:padding-top="0.265cm" fo:padding-bottom="0.265cm" fo:border="0.75pt solid #8c8c8c">
        <style:background-image/>
      </style:table-cell-properties>
    </style:style>
    <style:style style:name="表格6" style:family="table">
      <style:table-properties style:width="16.768cm" style:rel-width="100%" fo:margin-left="0.012cm" fo:margin-top="0cm" fo:margin-bottom="0cm" table:align="left" style:writing-mode="page"/>
    </style:style>
    <style:style style:name="表格6.A" style:family="table-column">
      <style:table-column-properties style:column-width="4.191cm" style:rel-column-width="16383*"/>
    </style:style>
    <style:style style:name="表格6.B" style:family="table-column">
      <style:table-column-properties style:column-width="6.288cm" style:rel-column-width="24576*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1f3864" fo:padding-left="0.265cm" fo:padding-right="0.265cm" fo:padding-top="0.212cm" fo:padding-bottom="0.212cm" fo:border-left="0.75pt solid #1f3864" fo:border-right="0.5pt solid #bfbfbf" fo:border-top="0.75pt solid #1f3864" fo:border-bottom="0.5pt solid #bfbfbf">
        <style:background-image/>
      </style:table-cell-properties>
    </style:style>
    <style:style style:name="表格6.B1" style:family="table-cell">
      <style:table-cell-properties fo:background-color="#1f3864" fo:padding-left="0.265cm" fo:padding-right="0.265cm" fo:padding-top="0.212cm" fo:padding-bottom="0.212cm" fo:border-left="0.5pt solid #bfbfbf" fo:border-right="0.5pt solid #bfbfbf" fo:border-top="0.75pt solid #1f3864" fo:border-bottom="0.5pt solid #bfbfbf">
        <style:background-image/>
      </style:table-cell-properties>
    </style:style>
    <style:style style:name="表格6.C1" style:family="table-cell">
      <style:table-cell-properties fo:background-color="#1f3864" fo:padding-left="0.265cm" fo:padding-right="0.265cm" fo:padding-top="0.212cm" fo:padding-bottom="0.212cm" fo:border-left="0.5pt solid #bfbfbf" fo:border-right="0.75pt solid #1f3864" fo:border-top="0.75pt solid #1f3864" fo:border-bottom="0.5pt solid #bfbfbf">
        <style:background-image/>
      </style:table-cell-properties>
    </style:style>
    <style:style style:name="表格6.A2" style:family="table-cell">
      <style:table-cell-properties fo:background-color="#ffffff" fo:padding-left="0.265cm" fo:padding-right="0.265cm" fo:padding-top="0.212cm" fo:padding-bottom="0.212cm" fo:border-left="0.75pt solid #1f3864" fo:border-right="0.5pt solid #bfbfbf" fo:border-top="0.5pt solid #bfbfbf" fo:border-bottom="0.5pt solid #bfbfbf">
        <style:background-image/>
      </style:table-cell-properties>
    </style:style>
    <style:style style:name="表格6.B2" style:family="table-cell">
      <style:table-cell-properties fo:background-color="#ffffff" fo:padding-left="0.265cm" fo:padding-right="0.265cm" fo:padding-top="0.212cm" fo:padding-bottom="0.212cm" fo:border="0.5pt solid #bfbfbf">
        <style:background-image/>
      </style:table-cell-properties>
    </style:style>
    <style:style style:name="表格6.C2" style:family="table-cell">
      <style:table-cell-properties fo:background-color="#ffffff" fo:padding-left="0.265cm" fo:padding-right="0.265cm" fo:padding-top="0.212cm" fo:padding-bottom="0.212cm" fo:border-left="0.5pt solid #bfbfbf" fo:border-right="0.75pt solid #1f3864" fo:border-top="0.5pt solid #bfbfbf" fo:border-bottom="0.5pt solid #bfbfbf">
        <style:background-image/>
      </style:table-cell-properties>
    </style:style>
    <style:style style:name="表格6.A3" style:family="table-cell">
      <style:table-cell-properties fo:background-color="#fbf7ed" fo:padding-left="0.265cm" fo:padding-right="0.265cm" fo:padding-top="0.212cm" fo:padding-bottom="0.212cm" fo:border-left="0.75pt solid #1f3864" fo:border-right="0.5pt solid #bfbfbf" fo:border-top="0.5pt solid #bfbfbf" fo:border-bottom="0.5pt solid #bfbfbf">
        <style:background-image/>
      </style:table-cell-properties>
    </style:style>
    <style:style style:name="表格6.B3" style:family="table-cell">
      <style:table-cell-properties fo:background-color="#fbf7ed" fo:padding-left="0.265cm" fo:padding-right="0.265cm" fo:padding-top="0.212cm" fo:padding-bottom="0.212cm" fo:border="0.5pt solid #bfbfbf">
        <style:background-image/>
      </style:table-cell-properties>
    </style:style>
    <style:style style:name="表格6.C3" style:family="table-cell">
      <style:table-cell-properties fo:background-color="#fbf7ed" fo:padding-left="0.265cm" fo:padding-right="0.265cm" fo:padding-top="0.212cm" fo:padding-bottom="0.212cm" fo:border-left="0.5pt solid #bfbfbf" fo:border-right="0.75pt solid #1f3864" fo:border-top="0.5pt solid #bfbfbf" fo:border-bottom="0.5pt solid #bfbfbf">
        <style:background-image/>
      </style:table-cell-properties>
    </style:style>
    <style:style style:name="表格6.A6" style:family="table-cell">
      <style:table-cell-properties fo:background-color="#ffffff" fo:padding-left="0.265cm" fo:padding-right="0.265cm" fo:padding-top="0.212cm" fo:padding-bottom="0.212cm" fo:border-left="0.75pt solid #1f3864" fo:border-right="0.5pt solid #bfbfbf" fo:border-top="0.5pt solid #bfbfbf" fo:border-bottom="0.75pt solid #1f3864">
        <style:background-image/>
      </style:table-cell-properties>
    </style:style>
    <style:style style:name="表格6.B6" style:family="table-cell">
      <style:table-cell-properties fo:background-color="#ffffff" fo:padding-left="0.265cm" fo:padding-right="0.265cm" fo:padding-top="0.212cm" fo:padding-bottom="0.212cm" fo:border-left="0.5pt solid #bfbfbf" fo:border-right="0.5pt solid #bfbfbf" fo:border-top="0.5pt solid #bfbfbf" fo:border-bottom="0.75pt solid #1f3864">
        <style:background-image/>
      </style:table-cell-properties>
    </style:style>
    <style:style style:name="表格6.C6" style:family="table-cell">
      <style:table-cell-properties fo:background-color="#ffffff" fo:padding-left="0.265cm" fo:padding-right="0.265cm" fo:padding-top="0.212cm" fo:padding-bottom="0.212cm" fo:border-left="0.5pt solid #bfbfbf" fo:border-right="0.75pt solid #1f3864" fo:border-top="0.5pt solid #bfbfbf" fo:border-bottom="0.75pt solid #1f3864">
        <style:background-image/>
      </style:table-cell-properties>
    </style:style>
    <style:style style:name="表格7" style:family="table">
      <style:table-properties style:width="16.768cm" style:rel-width="100%" fo:margin-left="0.018cm" fo:margin-top="0cm" fo:margin-bottom="0cm" table:align="left" style:writing-mode="page"/>
    </style:style>
    <style:style style:name="表格7.A" style:family="table-column">
      <style:table-column-properties style:column-width="16.768cm" style:rel-column-width="65535*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e8f5e9" fo:padding-left="0.353cm" fo:padding-right="0.353cm" fo:padding-top="0.265cm" fo:padding-bottom="0.265cm" fo:border="1pt solid #2e7d32">
        <style:background-image/>
      </style:table-cell-properties>
    </style:style>
    <style:style style:name="表格8" style:family="table">
      <style:table-properties style:width="16.768cm" style:rel-width="100%" fo:margin-left="0.018cm" fo:margin-top="0cm" fo:margin-bottom="0cm" table:align="left" style:writing-mode="page"/>
    </style:style>
    <style:style style:name="表格8.A" style:family="table-column">
      <style:table-column-properties style:column-width="16.768cm" style:rel-column-width="65535*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fff8e1" fo:padding-left="0.353cm" fo:padding-right="0.353cm" fo:padding-top="0.265cm" fo:padding-bottom="0.265cm" fo:border="1pt solid #f9a825">
        <style:background-image/>
      </style:table-cell-properties>
    </style:style>
    <style:style style:name="表格9" style:family="table">
      <style:table-properties style:width="16.768cm" style:rel-width="100%" fo:margin-left="0.018cm" fo:margin-top="0cm" fo:margin-bottom="0cm" table:align="left" style:writing-mode="page"/>
    </style:style>
    <style:style style:name="表格9.A" style:family="table-column">
      <style:table-column-properties style:column-width="16.768cm" style:rel-column-width="65535*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decea" fo:padding-left="0.353cm" fo:padding-right="0.353cm" fo:padding-top="0.265cm" fo:padding-bottom="0.265cm" fo:border="1pt solid #c62828">
        <style:background-image/>
      </style:table-cell-properties>
    </style:style>
    <style:style style:name="表格10" style:family="table">
      <style:table-properties style:width="16.768cm" style:rel-width="100%" fo:margin-left="0.012cm" fo:margin-top="0cm" fo:margin-bottom="0cm" table:align="left" style:writing-mode="page"/>
    </style:style>
    <style:style style:name="表格10.A" style:family="table-column">
      <style:table-column-properties style:column-width="16.768cm" style:rel-column-width="65535*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2f2f2" fo:padding-left="0.441cm" fo:padding-right="0.441cm" fo:padding-top="0.265cm" fo:padding-bottom="0.265cm" fo:border="0.75pt solid #8c8c8c">
        <style:background-image/>
      </style:table-cell-properties>
    </style:style>
    <style:style style:name="P1" style:family="paragraph" style:parent-style-name="Standard">
      <style:paragraph-properties fo:margin-top="1.411cm" fo:margin-bottom="0.176cm" style:contextual-spacing="false" fo:text-align="center" style:justify-single-word="false"/>
    </style:style>
    <style:style style:name="P2" style:family="paragraph" style:parent-style-name="Standard">
      <style:paragraph-properties fo:margin-top="0cm" fo:margin-bottom="0.106cm" style:contextual-spacing="false" fo:text-align="center" style:justify-single-word="false"/>
    </style:style>
    <style:style style:name="P3" style:family="paragraph" style:parent-style-name="Standard">
      <style:paragraph-properties fo:margin-top="0cm" fo:margin-bottom="0.882cm" style:contextual-spacing="false" fo:text-align="center" style:justify-single-word="false"/>
    </style:style>
    <style:style style:name="P4" style:family="paragraph" style:parent-style-name="Heading_20_1">
      <style:paragraph-properties fo:margin-top="0.635cm" fo:margin-bottom="0.282cm" style:contextual-spacing="false" fo:padding-left="0cm" fo:padding-right="0cm" fo:padding-top="0cm" fo:padding-bottom="0.141cm" fo:border-left="none" fo:border-right="none" fo:border-top="none" fo:border-bottom="0.74pt solid #c08a2e"/>
    </style:style>
    <style:style style:name="P5" style:family="paragraph" style:parent-style-name="Standard">
      <style:paragraph-properties fo:margin-top="0cm" fo:margin-bottom="0.282cm" style:contextual-spacing="false"/>
    </style:style>
    <style:style style:name="P6" style:family="paragraph" style:parent-style-name="Heading_20_2">
      <style:paragraph-properties fo:margin-top="0.459cm" fo:margin-bottom="0.212cm" style:contextual-spacing="false"/>
    </style:style>
    <style:style style:name="P7" style:family="paragraph" style:parent-style-name="Standard">
      <style:paragraph-properties fo:margin-top="0cm" fo:margin-bottom="0.035cm" style:contextual-spacing="false"/>
    </style:style>
    <style:style style:name="P8" style:family="paragraph" style:parent-style-name="Standard">
      <style:paragraph-properties fo:margin-top="0cm" fo:margin-bottom="0.247cm" style:contextual-spacing="false"/>
    </style:style>
    <style:style style:name="P9" style:family="paragraph" style:parent-style-name="Standard">
      <style:paragraph-properties fo:margin-top="0cm" fo:margin-bottom="0.141cm" style:contextual-spacing="false"/>
    </style:style>
    <style:style style:name="P10" style:family="paragraph" style:parent-style-name="Standard">
      <style:paragraph-properties fo:margin-top="0cm" fo:margin-bottom="0.106cm" style:contextual-spacing="fals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margin-top="0cm" fo:margin-bottom="0.353cm" style:contextual-spacing="false"/>
    </style:style>
    <style:style style:name="T1" style:family="text">
      <style:text-properties fo:color="#1f3864" loext:opacity="100%" style:font-name="Microsoft JhengHei" fo:font-size="26pt" fo:font-weight="bold" style:font-name-asian="Microsoft JhengHei1" style:font-size-asian="26pt" style:font-weight-asian="bold" style:font-name-complex="Microsoft JhengHei1" style:font-size-complex="26pt" style:font-weight-complex="bold"/>
    </style:style>
    <style:style style:name="T2" style:family="text">
      <style:text-properties fo:color="#c08a2e" loext:opacity="100%" fo:font-family="Consolas" style:font-family-generic="roman" style:font-pitch="variable" fo:font-size="15pt" fo:font-weight="bold" style:font-family-asian="Consolas" style:font-family-generic-asian="system" style:font-pitch-asian="variable" style:font-size-asian="15pt" style:font-weight-asian="bold" style:font-family-complex="Consolas" style:font-family-generic-complex="system" style:font-pitch-complex="variable" style:font-size-complex="15pt" style:font-weight-complex="bold"/>
    </style:style>
    <style:style style:name="T3" style:family="text">
      <style:text-properties fo:color="#595959" loext:opacity="100%" style:font-name="Microsoft JhengHei" fo:font-size="11pt" style:font-name-asian="Microsoft JhengHei1" style:font-size-asian="11pt" style:font-name-complex="Microsoft JhengHei1" style:font-size-complex="11pt"/>
    </style:style>
    <style:style style:name="T4" style:family="text">
      <style:text-properties fo:color="#1f3864" loext:opacity="100%" style:font-name="Microsoft JhengHei" fo:font-size="15pt" fo:font-weight="bold" style:font-name-asian="Microsoft JhengHei1" style:font-size-asian="15pt" style:font-weight-asian="bold" style:font-name-complex="Microsoft JhengHei1" style:font-size-complex="15pt" style:font-weight-complex="bold"/>
    </style:style>
    <style:style style:name="T5" style:family="text">
      <style:text-properties fo:color="#262626" loext:opacity="100%" style:font-name="Microsoft JhengHei" fo:font-size="11pt" fo:font-weight="normal" style:font-name-asian="Microsoft JhengHei1" style:font-size-asian="11pt" style:font-weight-asian="normal" style:font-name-complex="Microsoft JhengHei1" style:font-size-complex="11pt" style:font-weight-complex="normal"/>
    </style:style>
    <style:style style:name="T6" style:family="text">
      <style:text-properties fo:color="#9a3412" loext:opacity="100%" fo:font-family="Consolas" style:font-family-generic="roman" style:font-pitch="variable" fo:font-size="11pt" fo:font-weight="normal" style:font-family-asian="Consolas" style:font-family-generic-asian="system" style:font-pitch-asian="variable" style:font-size-asian="11pt" style:font-weight-asian="normal" style:font-family-complex="Consolas" style:font-family-generic-complex="system" style:font-pitch-complex="variable" style:font-size-complex="11pt" style:font-weight-complex="normal"/>
    </style:style>
    <style:style style:name="T7" style:family="text">
      <style:text-properties fo:color="#2e5395" loext:opacity="100%" style:font-name="Microsoft JhengHei" fo:font-size="12.5pt" fo:font-weight="bold" style:font-name-asian="Microsoft JhengHei1" style:font-size-asian="12.5pt" style:font-weight-asian="bold" style:font-name-complex="Microsoft JhengHei1" style:font-size-complex="12.5pt" style:font-weight-complex="bold"/>
    </style:style>
    <style:style style:name="T8" style:family="text">
      <style:text-properties fo:color="#3d3d3d" loext:opacity="100%" fo:font-family="Consolas" style:font-family-generic="roman" style:font-pitch="variable" fo:font-size="10pt" style:font-family-asian="Consolas" style:font-family-generic-asian="system" style:font-pitch-asian="variable" style:font-size-asian="10pt" style:font-family-complex="Consolas" style:font-family-generic-complex="system" style:font-pitch-complex="variable" style:font-size-complex="10pt"/>
    </style:style>
    <style:style style:name="T9" style:family="text">
      <style:text-properties fo:color="#1e3a8a" loext:opacity="100%" style:font-name="Microsoft JhengHei" fo:font-size="11pt" fo:font-weight="bold" style:font-name-asian="Microsoft JhengHei1" style:font-size-asian="11pt" style:font-weight-asian="bold" style:font-name-complex="Microsoft JhengHei1" style:font-size-complex="11pt" style:font-weight-complex="bold"/>
    </style:style>
    <style:style style:name="T10" style:family="text">
      <style:text-properties fo:color="#333333" loext:opacity="100%" style:font-name="Microsoft JhengHei" fo:font-size="10.5pt" fo:font-weight="normal" style:font-name-asian="Microsoft JhengHei1" style:font-size-asian="10.5pt" style:font-weight-asian="normal" style:font-name-complex="Microsoft JhengHei1" style:font-size-complex="10.5pt" style:font-weight-complex="normal"/>
    </style:style>
    <style:style style:name="T11" style:family="text">
      <style:text-properties fo:color="#9a3412" loext:opacity="100%" fo:font-family="Consolas" style:font-family-generic="roman" style:font-pitch="variable" fo:font-size="10.5pt" fo:font-weight="normal" style:font-family-asian="Consolas" style:font-family-generic-asian="system" style:font-pitch-asian="variable" style:font-size-asian="10.5pt" style:font-weight-asian="normal" style:font-family-complex="Consolas" style:font-family-generic-complex="system" style:font-pitch-complex="variable" style:font-size-complex="10.5pt" style:font-weight-complex="normal"/>
    </style:style>
    <style:style style:name="T12" style:family="text">
      <style:text-properties fo:color="#333333" loext:opacity="100%" fo:font-family="Consolas" style:font-family-generic="roman" style:font-pitch="variable" fo:font-size="10.5pt" fo:font-weight="bold" style:font-family-asian="Consolas" style:font-family-generic-asian="system" style:font-pitch-asian="variable" style:font-size-asian="10.5pt" style:font-weight-asian="bold" style:font-family-complex="Consolas" style:font-family-generic-complex="system" style:font-pitch-complex="variable" style:font-size-complex="10.5pt" style:font-weight-complex="bold"/>
    </style:style>
    <style:style style:name="T13" style:family="text">
      <style:text-properties fo:color="#ffffff" loext:opacity="100%" style:font-name="Microsoft JhengHei" fo:font-size="10.5pt" fo:font-weight="bold" style:font-name-asian="Microsoft JhengHei1" style:font-size-asian="10.5pt" style:font-weight-asian="bold" style:font-name-complex="Microsoft JhengHei1" style:font-size-complex="10.5pt" style:font-weight-complex="bold"/>
    </style:style>
    <style:style style:name="T14" style:family="text">
      <style:text-properties fo:color="#262626" loext:opacity="100%" style:font-name="Microsoft JhengHei" fo:font-size="10pt" style:font-name-asian="Microsoft JhengHei1" style:font-size-asian="10pt" style:font-name-complex="Microsoft JhengHei1" style:font-size-complex="10pt"/>
    </style:style>
    <style:style style:name="T15" style:family="text">
      <style:text-properties fo:color="#1b5e20" loext:opacity="100%" style:font-name="Microsoft JhengHei" fo:font-size="11pt" fo:font-weight="bold" style:font-name-asian="Microsoft JhengHei1" style:font-size-asian="11pt" style:font-weight-asian="bold" style:font-name-complex="Microsoft JhengHei1" style:font-size-complex="11pt" style:font-weight-complex="bold"/>
    </style:style>
    <style:style style:name="T16" style:family="text">
      <style:text-properties fo:color="#1b5e20" loext:opacity="100%" style:font-name="Microsoft JhengHei" fo:font-size="10.5pt" fo:font-weight="bold" style:font-name-asian="Microsoft JhengHei1" style:font-size-asian="10.5pt" style:font-weight-asian="bold" style:font-name-complex="Microsoft JhengHei1" style:font-size-complex="10.5pt" style:font-weight-complex="bold"/>
    </style:style>
    <style:style style:name="T17" style:family="text">
      <style:text-properties fo:color="#8a6d1e" loext:opacity="100%" style:font-name="Microsoft JhengHei" fo:font-size="11pt" fo:font-weight="bold" style:font-name-asian="Microsoft JhengHei1" style:font-size-asian="11pt" style:font-weight-asian="bold" style:font-name-complex="Microsoft JhengHei1" style:font-size-complex="11pt" style:font-weight-complex="bold"/>
    </style:style>
    <style:style style:name="T18" style:family="text">
      <style:text-properties fo:color="#8a6d1e" loext:opacity="100%" fo:font-family="Consolas" style:font-family-generic="roman" style:font-pitch="variable" fo:font-size="10.5pt" fo:font-weight="bold" style:font-family-asian="Consolas" style:font-family-generic-asian="system" style:font-pitch-asian="variable" style:font-size-asian="10.5pt" style:font-weight-asian="bold" style:font-family-complex="Consolas" style:font-family-generic-complex="system" style:font-pitch-complex="variable" style:font-size-complex="10.5pt" style:font-weight-complex="bold"/>
    </style:style>
    <style:style style:name="T19" style:family="text">
      <style:text-properties fo:color="#8c1d18" loext:opacity="100%" style:font-name="Microsoft JhengHei" fo:font-size="11pt" fo:font-weight="bold" style:font-name-asian="Microsoft JhengHei1" style:font-size-asian="11pt" style:font-weight-asian="bold" style:font-name-complex="Microsoft JhengHei1" style:font-size-complex="11pt" style:font-weight-complex="bold"/>
    </style:style>
    <style:style style:name="T20" style:family="text">
      <style:text-properties fo:color="#8c1d18" loext:opacity="100%" fo:font-family="Consolas" style:font-family-generic="roman" style:font-pitch="variable" fo:font-size="10.5pt" fo:font-weight="bold" style:font-family-asian="Consolas" style:font-family-generic-asian="system" style:font-pitch-asian="variable" style:font-size-asian="10.5pt" style:font-weight-asian="bold" style:font-family-complex="Consolas" style:font-family-generic-complex="system" style:font-pitch-complex="variable" style:font-size-complex="10.5pt" style:font-weight-complex="bold"/>
    </style:style>
    <style:style style:name="T21" style:family="text">
      <style:text-properties fo:color="#1f3864" loext:opacity="100%" style:font-name="Microsoft JhengHei" fo:font-size="11pt" fo:font-weight="bold" style:font-name-asian="Microsoft JhengHei1" style:font-size-asian="11pt" style:font-weight-asian="bold" style:font-name-complex="Microsoft JhengHei1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hell 執行方式筆記</text:span></text:p>
      <text:p text:style-name="P2"><text:span text:style-name="T2">./script.sh <text:s/>vs. <text:s/>source script.sh</text:span></text:p>
      <text:p text:style-name="P3"><text:span text:style-name="T3">子 Shell 與目前 Shell 的差異 ─ 公職資訊類考試重點整理</text:span></text:p>
      <text:p text:style-name="P4"><text:span text:style-name="T4">一、現象：為什麼變數不見了？</text:span></text:p>
      <text:p text:style-name="P5"><text:span text:style-name="T5">先看一個每個人第一次用 Shell Script 都會踩到的坑：明明剛剛才在腳本裡設定了變數，回到終端機一查卻什麼都沒有。這正是 </text:span><text:span text:style-name="T6">source</text:span><text:span text:style-name="T5"> 指令存在的核心理由。我們用同一組實驗，一步一步拆解。</text:span></text:p>
      <text:p text:style-name="P6"><text:span text:style-name="T7">步驟 1：直接執行 ./helloworld.sh</text:span></text:p>
      <text:p text:style-name="P5"><text:span text:style-name="T5">假設 </text:span><text:span text:style-name="T6">helloworld.sh</text:span><text:span text:style-name="T5"> 內容如下：</text:span>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7"><text:span text:style-name="T8">#!/bin/bash</text:span></text:p>
            <text:p text:style-name="P7"/>
            <text:p text:style-name="P7"><text:span text:style-name="T8">STR="hello world"</text:span></text:p>
            <text:p text:style-name="P7"><text:span text:style-name="T8">echo $STR</text:span></text:p>
          </table:table-cell>
        </table:table-row>
      </table:table>
      <text:p text:style-name="P8"/>
      <text:p text:style-name="P5"><text:span text:style-name="T5">執行 </text:span><text:span text:style-name="T6">./helloworld.sh</text:span><text:span text:style-name="T5">，畫面輸出 </text:span><text:span text:style-name="T6">hello world</text:span><text:span text:style-name="T5">，看起來一切正常。但接著在同一個終端機輸入 </text:span><text:span text:style-name="T6">echo $STR</text:span><text:span text:style-name="T5">，結果卻是一片空白 —— 變數 </text:span><text:span text:style-name="T6">STR</text:span><text:span text:style-name="T5"> 彷彿從未存在過。</text:span>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9"><text:span text:style-name="T9">🔵 深度思考：為什麼變數會消失？</text:span></text:p>
            <text:p text:style-name="P10"><text:span text:style-name="T10">因為 </text:span><text:span text:style-name="T11">./helloworld.sh</text:span><text:span text:style-name="T10"> 會另外建立一個「新的 bash process（子行程）」來執行腳本內容。這個子行程有自己獨立的記憶體空間，</text:span><text:span text:style-name="T12">STR</text:span><text:span text:style-name="T10"> 這個變數只存在於子行程當中。子行程一結束，連同它所有的變數一起被作業系統回收，完全不會回傳給原本呼叫它的父 Shell。</text:span></text:p>
          </table:table-cell>
        </table:table-row>
      </table:table>
      <text:p text:style-name="P5"/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7"><text:span text:style-name="T8">目前 Shell (父行程)</text:span></text:p>
            <text:p text:style-name="P7"><text:span text:style-name="T8"><text:s text:c="3"/>│</text:span></text:p>
            <text:p text:style-name="P7"><text:span text:style-name="T8"><text:s text:c="3"/>├─ 執行 ./helloworld.sh</text:span></text:p>
            <text:p text:style-name="P7"><text:span text:style-name="T8"><text:s text:c="3"/>│ <text:s text:c="5"/>│</text:span></text:p>
            <text:p text:style-name="P7"><text:span text:style-name="T8"><text:s text:c="3"/>│ <text:s text:c="5"/>▼</text:span></text:p>
            <text:p text:style-name="P7"><text:span text:style-name="T8"><text:s text:c="3"/>│ <text:s text:c="2"/>新的 Bash 子行程</text:span></text:p>
            <text:p text:style-name="P7"><text:span text:style-name="T8"><text:s text:c="3"/>│ <text:s text:c="2"/>STR="hello world"</text:span></text:p>
            <text:p text:style-name="P7"><text:span text:style-name="T8"><text:s text:c="3"/>│ <text:s text:c="2"/>echo hello world</text:span></text:p>
            <text:p text:style-name="P7"><text:span text:style-name="T8"><text:s text:c="3"/>│ <text:s text:c="2"/>（子行程結束，STR 一併消滅）</text:span></text:p>
            <text:p text:style-name="P7"><text:span text:style-name="T8"><text:s text:c="3"/>│</text:span></text:p>
            <text:p text:style-name="P7"><text:span text:style-name="T8"><text:s text:c="3"/>└─ 回到原本 Shell → echo $STR → （空白，找不到）</text:span></text:p>
          </table:table-cell>
        </table:table-row>
      </table:table>
      <text:p text:style-name="P6"><text:soft-page-break/><text:span text:style-name="T7">步驟 2：改用 source ./helloworld.sh</text:span></text:p>
      <text:p text:style-name="P5"><text:span text:style-name="T5">同一支腳本，這次改用 </text:span><text:span text:style-name="T6">source ./helloworld.sh</text:span><text:span text:style-name="T5"> 執行，畫面一樣先輸出 </text:span><text:span text:style-name="T6">hello world</text:span><text:span text:style-name="T5">。但這次接著輸入 </text:span><text:span text:style-name="T6">echo $STR</text:span><text:span text:style-name="T5">，結果卻真的印出了 </text:span><text:span text:style-name="T6">hello world</text:span><text:span text:style-name="T5">。</text:span></text:p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9"><text:span text:style-name="T9">🔵 深度思考：為什麼這次變數留下來了？</text:span></text:p>
            <text:p text:style-name="P10"><text:span text:style-name="T10">因為 </text:span><text:span text:style-name="T11">source</text:span><text:span text:style-name="T10">（或簡寫 </text:span><text:span text:style-name="T11">.</text:span><text:span text:style-name="T10">）完全不會建立新的行程。它做的事情，是把腳本檔案裡的每一行指令，直接讀進「目前這個 Shell」逐行執行，效果等同於你自己把這些指令一行一行手動打進終端機。既然指令是在目前的 Shell 中執行，設定出來的變數自然就留在目前的 Shell 裡。</text:span></text:p>
          </table:table-cell>
        </table:table-row>
      </table:table>
      <text:p text:style-name="P5"/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7"><text:span text:style-name="T8">目前 Shell</text:span></text:p>
            <text:p text:style-name="P7"><text:span text:style-name="T8"><text:s text:c="3"/>│</text:span></text:p>
            <text:p text:style-name="P7"><text:span text:style-name="T8"><text:s text:c="3"/>├─ source ./helloworld.sh</text:span></text:p>
            <text:p text:style-name="P7"><text:span text:style-name="T8"><text:s text:c="3"/>│ <text:s text:c="5"/>│</text:span></text:p>
            <text:p text:style-name="P7"><text:span text:style-name="T8"><text:s text:c="3"/>│ <text:s text:c="5"/>▼</text:span></text:p>
            <text:p text:style-name="P7"><text:span text:style-name="T8"><text:s text:c="3"/>│ <text:s text:c="2"/>直接在「目前 Shell」逐行執行內容</text:span></text:p>
            <text:p text:style-name="P7"><text:span text:style-name="T8"><text:s text:c="3"/>│ <text:s text:c="2"/>STR="hello world"</text:span></text:p>
            <text:p text:style-name="P7"><text:span text:style-name="T8"><text:s text:c="3"/>│ <text:s text:c="2"/>echo hello world</text:span></text:p>
            <text:p text:style-name="P7"><text:span text:style-name="T8"><text:s text:c="3"/>│</text:span></text:p>
            <text:p text:style-name="P7"><text:span text:style-name="T8"><text:s text:c="3"/>└─ STR 留在目前 Shell → echo $STR → hello world ✓</text:span></text:p>
          </table:table-cell>
        </table:table-row>
      </table:table>
      <text:p text:style-name="P4"><text:span text:style-name="T4">二、兩者核心差異對照</text:span></text:p>
      <table:table table:name="表格6" table:style-name="表格6">
        <table:table-column table:style-name="表格6.A"/>
        <table:table-column table:style-name="表格6.B" table:number-columns-repeated="2"/>
        <table:table-header-rows>
          <table:table-row table:style-name="表格6.1">
            <table:table-cell table:style-name="表格6.A1" office:value-type="string">
              <text:p text:style-name="P11"><text:span text:style-name="T13">比較項目</text:span></text:p>
            </table:table-cell>
            <table:table-cell table:style-name="表格6.B1" office:value-type="string">
              <text:p text:style-name="P11"><text:span text:style-name="T13">./script.sh</text:span></text:p>
            </table:table-cell>
            <table:table-cell table:style-name="表格6.C1" office:value-type="string">
              <text:p text:style-name="P11"><text:span text:style-name="T13">source script.sh</text:span></text:p>
            </table:table-cell>
          </table:table-row>
        </table:table-header-rows>
        <table:table-row table:style-name="表格6.1">
          <table:table-cell table:style-name="表格6.A2" office:value-type="string">
            <text:p text:style-name="Standard"><text:span text:style-name="T14">執行方式</text:span></text:p>
          </table:table-cell>
          <table:table-cell table:style-name="表格6.B2" office:value-type="string">
            <text:p text:style-name="Standard"><text:span text:style-name="T14">建立新的子行程 (subshell)</text:span></text:p>
          </table:table-cell>
          <table:table-cell table:style-name="表格6.C2" office:value-type="string">
            <text:p text:style-name="Standard"><text:span text:style-name="T14">在目前 Shell 中逐行執行</text:span></text:p>
          </table:table-cell>
        </table:table-row>
        <table:table-row table:style-name="表格6.1">
          <table:table-cell table:style-name="表格6.A3" office:value-type="string">
            <text:p text:style-name="Standard"><text:span text:style-name="T14">是否需要執行權限</text:span></text:p>
          </table:table-cell>
          <table:table-cell table:style-name="表格6.B3" office:value-type="string">
            <text:p text:style-name="Standard"><text:span text:style-name="T14">需要（chmod +x）</text:span></text:p>
          </table:table-cell>
          <table:table-cell table:style-name="表格6.C3" office:value-type="string">
            <text:p text:style-name="Standard"><text:span text:style-name="T14">不需要，只要檔案可讀即可</text:span></text:p>
          </table:table-cell>
        </table:table-row>
        <table:table-row table:style-name="表格6.1">
          <table:table-cell table:style-name="表格6.A2" office:value-type="string">
            <text:p text:style-name="Standard"><text:span text:style-name="T14">變數 / 函式是否保留</text:span></text:p>
          </table:table-cell>
          <table:table-cell table:style-name="表格6.B2" office:value-type="string">
            <text:p text:style-name="Standard"><text:span text:style-name="T14">不會，子行程結束即消失</text:span></text:p>
          </table:table-cell>
          <table:table-cell table:style-name="表格6.C2" office:value-type="string">
            <text:p text:style-name="Standard"><text:span text:style-name="T14">會，直接留在目前 Shell</text:span></text:p>
          </table:table-cell>
        </table:table-row>
        <table:table-row table:style-name="表格6.1">
          <table:table-cell table:style-name="表格6.A3" office:value-type="string">
            <text:p text:style-name="Standard"><text:span text:style-name="T14">cd 切換目錄是否保留</text:span></text:p>
          </table:table-cell>
          <table:table-cell table:style-name="表格6.B3" office:value-type="string">
            <text:p text:style-name="Standard"><text:span text:style-name="T14">不會，只影響子行程</text:span></text:p>
          </table:table-cell>
          <table:table-cell table:style-name="表格6.C3" office:value-type="string">
            <text:p text:style-name="Standard"><text:span text:style-name="T14">會，目前 Shell 的目錄跟著改變</text:span></text:p>
          </table:table-cell>
        </table:table-row>
        <table:table-row table:style-name="表格6.1">
          <table:table-cell table:style-name="表格6.A6" office:value-type="string">
            <text:p text:style-name="Standard"><text:span text:style-name="T14">常見用途</text:span></text:p>
          </table:table-cell>
          <table:table-cell table:style-name="表格6.B6" office:value-type="string">
            <text:p text:style-name="Standard"><text:span text:style-name="T14">一般執行程式、批次腳本</text:span></text:p>
          </table:table-cell>
          <table:table-cell table:style-name="表格6.C6" office:value-type="string">
            <text:p text:style-name="Standard"><text:span text:style-name="T14">載入設定檔（.bashrc、環境變數、alias）</text:span></text:p>
          </table:table-cell>
        </table:table-row>
      </table:table>
      <text:p text:style-name="P12"/>
      <text:p text:style-name="P4"><text:span text:style-name="T4">三、口訣與結論</text:span>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9"><text:span text:style-name="T15">🟢 結論 / 記憶口訣</text:span></text:p>
            <text:p text:style-name="P10"><text:span text:style-name="T10">./script.sh　＝　開一間新房間做事，做完就把房間拆掉，房間裡的東西（變數）全部消失。</text:span></text:p>
            <text:p text:style-name="P10"><text:soft-page-break/><text:span text:style-name="T10">source script.sh　＝　就在你現在這個房間做事，做完的東西（變數）當然全部留下來。</text:span></text:p>
            <text:p text:style-name="P10"><text:span text:style-name="T10">一句話記憶：</text:span><text:span text:style-name="T16">子 Shell 用完即丟，source 直接留在原地。</text:span></text:p>
          </table:table-cell>
        </table:table-row>
      </table:table>
      <text:p text:style-name="P5"/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9"><text:span text:style-name="T17">🟡 考點提醒：.bashrc 為什麼要用 source？</text:span></text:p>
            <text:p text:style-name="P10"><text:span text:style-name="T10">修改 </text:span><text:span text:style-name="T11">~/.bashrc</text:span><text:span text:style-name="T10"> 或 </text:span><text:span text:style-name="T11">~/.profile</text:span><text:span text:style-name="T10"> 之後，正確做法是：</text:span></text:p>
            <text:p text:style-name="P10"><text:span text:style-name="T18">source ~/.bashrc</text:span></text:p>
            <text:p text:style-name="P10"><text:span text:style-name="T10">而不是 </text:span><text:span text:style-name="T11">./.bashrc</text:span><text:span text:style-name="T10">。原因就是我們希望 PATH、環境變數、alias 這些設定，能夠直接套用到「目前正在使用」的這個 Shell，而不是只在一個執行完就消失的子行程裡短暫生效。這是考試中很常被拿來考「情境判斷」的重點。</text:span></text:p>
          </table:table-cell>
        </table:table-row>
      </table:table>
      <text:p text:style-name="P5"/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9"><text:span text:style-name="T19">🔴 常見陷阱：export 也救不回來</text:span></text:p>
            <text:p text:style-name="P10"><text:span text:style-name="T10">很多人會誤以為，只要在子 Shell 裡把變數改成 </text:span><text:span text:style-name="T11">export STR="hello world"</text:span><text:span text:style-name="T10">，就能讓父 Shell 也看到這個變數。這是錯的。</text:span></text:p>
            <text:p text:style-name="P10"><text:span text:style-name="T20">export</text:span><text:span text:style-name="T10"> 的作用方向是「父行程 → 子行程」：它讓變數可以被之後產生的子行程繼承。但這是單向的，子行程再怎麼 export，也無法逆向把變數傳回父行程。真正能讓父 Shell 拿到變數的方法，只有 </text:span><text:span text:style-name="T11">source</text:span><text:span text:style-name="T10">（在同一個 Shell 內執行），或是子行程主動把結果寫到檔案 / 用其他 IPC 機制傳回。</text:span></text:p>
          </table:table-cell>
        </table:table-row>
      </table:table>
      <text:p text:style-name="P12"/>
      <text:p text:style-name="P4"><text:span text:style-name="T4">四、兩種模式總覽圖</text:span></text:p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7"><text:span text:style-name="T8"><text:s text:c="2"/>./script.sh <text:s text:c="24"/>source script.sh</text:span></text:p>
            <text:p text:style-name="P7"><text:span text:style-name="T8"><text:s text:c="2"/>───────────── <text:s text:c="22"/>─────────────────</text:span></text:p>
            <text:p text:style-name="P7"><text:span text:style-name="T8"><text:s text:c="2"/>目前 Shell <text:s text:c="27"/>目前 Shell</text:span></text:p>
            <text:p text:style-name="P7"><text:span text:style-name="T8"><text:s text:c="5"/>│ <text:s text:c="35"/>│</text:span></text:p>
            <text:p text:style-name="P7"><text:span text:style-name="T8"><text:s text:c="5"/>▼ <text:s text:c="35"/>▼</text:span></text:p>
            <text:p text:style-name="P7"><text:span text:style-name="T8"><text:s text:c="2"/>開新 Shell (子行程) <text:s text:c="17"/>直接執行內容</text:span></text:p>
            <text:p text:style-name="P7"><text:span text:style-name="T8"><text:s text:c="5"/>│ <text:s text:c="35"/>│</text:span></text:p>
            <text:p text:style-name="P7"><text:span text:style-name="T8"><text:s text:c="2"/>STR=hello <text:s text:c="27"/>STR=hello</text:span></text:p>
            <text:p text:style-name="P7"><text:span text:style-name="T8"><text:s text:c="5"/>│ <text:s text:c="35"/>│</text:span></text:p>
            <text:p text:style-name="P7"><text:span text:style-name="T8"><text:s text:c="2"/>結束 → 子行程連同 STR 一起消滅 <text:s text:c="8"/>echo hello</text:span></text:p>
            <text:p text:style-name="P7"><text:span text:style-name="T8"><text:s text:c="5"/>│ <text:s text:c="35"/>│</text:span></text:p>
            <text:p text:style-name="P7"><text:span text:style-name="T8"><text:s text:c="5"/>▼ <text:s text:c="35"/>▼</text:span></text:p>
            <text:p text:style-name="P7"><text:span text:style-name="T8"><text:s text:c="2"/>回到原本 Shell <text:s text:c="23"/>STR 留在目前 Shell</text:span></text:p>
            <text:p text:style-name="P7"><text:span text:style-name="T8"><text:s text:c="2"/>STR 不存在 <text:s text:c="27"/>echo $STR → hello world ✓</text:span></text:p>
          </table:table-cell>
        </table:table-row>
      </table:table>
      <text:p text:style-name="P5"/>
      <text:p text:style-name="P5"><text:span text:style-name="T5">小結：判斷一支腳本該用哪種方式執行，關鍵永遠是問自己一句話——</text:span><text:span text:style-name="T21">「我需要這支腳本改變目前 Shell 的環境嗎？」</text:span><text:span text:style-name="T5"> 需要（設定變數、切換目錄、載入 alias）就用 </text:span><text:span text:style-name="T6">source</text:span><text:span text:style-name="T5">；只是想單純執行一段程式邏輯、跑完拿結果，就用 </text:span><text:span text:style-name="T6">./script.sh</text:span><text:span text:style-name="T5"> 即可。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262626" loext:opacity="100%" style:font-name="Microsoft JhengHei" fo:font-size="11pt" fo:language="en" fo:country="US" style:letter-kerning="false" style:font-name-asian="Microsoft JhengHei1" style:font-size-asian="11pt" style:language-asian="zh" style:country-asian="TW" style:font-name-complex="Microsoft JhengHe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fo:color="#262626" loext:opacity="100%" style:font-name="Microsoft JhengHei" fo:font-size="11pt" fo:language="en" fo:country="US" style:letter-kerning="false" style:font-name-asian="Microsoft JhengHei1" style:font-size-asian="11pt" style:language-asian="zh" style:country-asian="TW" style:font-name-complex="Microsoft JhengHe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chapter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chapter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right" style:justify-single-word="false" fo:padding-left="0cm" fo:padding-right="0cm" fo:padding-top="0cm" fo:padding-bottom="0.071cm" fo:border-left="none" fo:border-right="none" fo:border-top="none" fo:border-bottom="0.51pt solid #d9d9d9"/>
    </style:style>
    <style:style style:name="MP2" style:family="paragraph" style:parent-style-name="Standard">
      <style:paragraph-properties fo:text-align="center" style:justify-single-word="false"/>
    </style:style>
    <style:style style:name="MT1" style:family="text">
      <style:text-properties fo:color="#8c8c8c" loext:opacity="100%" style:font-name="Microsoft JhengHei" fo:font-size="8pt" style:font-name-asian="Microsoft JhengHei1" style:font-size-asian="8pt" style:font-name-complex="Microsoft JhengHei1" style:font-size-complex="8pt"/>
    </style:style>
    <style:style style:name="MT2" style:family="text">
      <style:text-properties fo:color="#8c8c8c" loext:opacity="100%" style:font-name="Microsoft JhengHei" fo:font-size="9pt" style:font-name-asian="Microsoft JhengHei1" style:font-size-asian="9pt" style:font-name-complex="Microsoft JhengHei1" style:font-size-complex="9pt"/>
    </style:style>
    <style:style style:name="MT3" style:family="text">
      <style:text-properties fo:color="#262626" loext:opacity="100%" style:font-name="Microsoft JhengHei" fo:font-size="11pt" fo:font-weight="normal" style:font-name-asian="Microsoft JhengHei1" style:font-size-asian="11pt" style:font-weight-asian="normal" style:font-name-complex="Microsoft JhengHei1" style:font-size-complex="11pt" style:font-weight-complex="normal"/>
    </style:style>
    <style:page-layout style:name="Mpm1">
      <style:page-layout-properties fo:page-width="21.001cm" fo:page-height="29.7cm" style:num-format="1" style:print-orientation="portrait" fo:margin-top="1.249cm" fo:margin-bottom="1.249cm" fo:margin-left="2.117cm" fo:margin-right="2.11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1cm" fo:margin-left="0cm" fo:margin-right="0cm" fo:margin-bottom="0.591cm" style:dynamic-spacing="true"/>
      </style:header-style>
      <style:footer-style>
        <style:header-footer-properties fo:min-height="0.691cm" fo:margin-left="0cm" fo:margin-right="0cm" fo:margin-top="0.5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Shell 執行方式筆記　│　./script.sh vs source</text:span></text:p>
      </style:header>
      <style:footer>
        <text:p text:style-name="MP2"><text:span text:style-name="MT2">第 </text:span><text:span text:style-name="MT3"><text:page-number text:select-page="current">3</text:page-number></text:span><text:span text:style-name="MT2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dc:creator>Un-named</dc:creator>
    <meta:editing-cycles>1</meta:editing-cycles>
    <meta:creation-date>2026-07-11T03:52:00.598000000</meta:creation-date>
    <dc:date>2026-07-11T03:52:00.623000000</dc:date>
    <meta:document-statistic meta:table-count="10" meta:image-count="0" meta:object-count="0" meta:page-count="3" meta:paragraph-count="87" meta:word-count="1352" meta:character-count="2828" meta:non-whitespace-character-count="2099"/>
    <meta:generator>LibreOffice/26.2.4.2$Windows_X86_64 LibreOffice_project/0229ac93fcf0d7cbc6376066c6f35021cef002dc</meta:generator>
  </office:meta>
</office:document-meta>
</file>