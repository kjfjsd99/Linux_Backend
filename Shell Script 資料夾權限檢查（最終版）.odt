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91cm" fo:margin-left="0.009cm" fo:margin-top="0cm" fo:margin-bottom="0cm" table:align="left" style:writing-mode="page"/>
    </style:style>
    <style:style style:name="表格1.A" style:family="table-column">
      <style:table-column-properties style:column-width="3.175cm"/>
    </style:style>
    <style:style style:name="表格1.B" style:family="table-column">
      <style:table-column-properties style:column-width="2.644cm"/>
    </style:style>
    <style:style style:name="表格1.C" style:family="table-column">
      <style:table-column-properties style:column-width="11.37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1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1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2" style:family="table">
      <style:table-properties style:width="17.191cm" fo:margin-left="0.009cm" fo:margin-top="0cm" fo:margin-bottom="0cm" table:align="left" style:writing-mode="page"/>
    </style:style>
    <style:style style:name="表格2.A" style:family="table-column">
      <style:table-column-properties style:column-width="4.233cm"/>
    </style:style>
    <style:style style:name="表格2.B" style:family="table-column">
      <style:table-column-properties style:column-width="12.958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2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2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3" style:family="table">
      <style:table-properties style:width="17.191cm" fo:margin-left="0.009cm" fo:margin-top="0cm" fo:margin-bottom="0cm" table:align="left" style:writing-mode="page"/>
    </style:style>
    <style:style style:name="表格3.A" style:family="table-column">
      <style:table-column-properties style:column-width="4.233cm"/>
    </style:style>
    <style:style style:name="表格3.B" style:family="table-column">
      <style:table-column-properties style:column-width="12.958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3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3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4" style:family="table">
      <style:table-properties style:width="17.191cm" fo:margin-left="0.009cm" fo:margin-top="0cm" fo:margin-bottom="0cm" table:align="left" style:writing-mode="page"/>
    </style:style>
    <style:style style:name="表格4.A" style:family="table-column">
      <style:table-column-properties style:column-width="4.233cm"/>
    </style:style>
    <style:style style:name="表格4.B" style:family="table-column">
      <style:table-column-properties style:column-width="12.958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4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4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5" style:family="table">
      <style:table-properties style:width="17.191cm" fo:margin-left="0.009cm" fo:margin-top="0cm" fo:margin-bottom="0cm" table:align="left" style:writing-mode="page"/>
    </style:style>
    <style:style style:name="表格5.A" style:family="table-column">
      <style:table-column-properties style:column-width="4.233cm"/>
    </style:style>
    <style:style style:name="表格5.B" style:family="table-column">
      <style:table-column-properties style:column-width="12.958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5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6" style:family="table">
      <style:table-properties style:width="17.191cm" fo:margin-left="0.009cm" fo:margin-top="0cm" fo:margin-bottom="0cm" table:align="left" style:writing-mode="page"/>
    </style:style>
    <style:style style:name="表格6.A" style:family="table-column">
      <style:table-column-properties style:column-width="3.175cm"/>
    </style:style>
    <style:style style:name="表格6.B" style:family="table-column">
      <style:table-column-properties style:column-width="14.016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6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6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7" style:family="table">
      <style:table-properties style:width="17.191cm" fo:margin-left="0.009cm" fo:margin-top="0cm" fo:margin-bottom="0cm" table:align="left" style:writing-mode="page"/>
    </style:style>
    <style:style style:name="表格7.A" style:family="table-column">
      <style:table-column-properties style:column-width="8.595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7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7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2.822cm"/>
    </style:style>
    <style:style style:name="表格8.B" style:family="table-column">
      <style:table-column-properties style:column-width="4.584cm"/>
    </style:style>
    <style:style style:name="表格8.C" style:family="table-column">
      <style:table-column-properties style:column-width="9.784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8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8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P1" style:family="paragraph" style:parent-style-name="Standard">
      <loext:graphic-properties draw:fill="solid" draw:fill-color="#1f3a5f"/>
      <style:paragraph-properties fo:margin-top="0cm" fo:margin-bottom="0cm" style:contextual-spacing="false" fo:text-align="center" style:justify-single-word="false" fo:background-color="#1f3a5f" fo:padding-left="0cm" fo:padding-right="0cm" fo:padding-top="0cm" fo:padding-bottom="0.282cm" fo:border-left="none" fo:border-right="none" fo:border-top="none" fo:border-bottom="3pt solid #d9760a"/>
      <style:text-properties fo:color="#ffffff" loext:opacity="100%" style:font-name="Microsoft JhengHei" fo:font-size="22pt" fo:font-weight="bold" style:font-name-asian="Microsoft JhengHei1" style:font-size-asian="22pt" style:font-weight-asian="bold" style:font-name-complex="Microsoft JhengHei1" style:font-size-complex="22pt" style:font-weight-complex="bold"/>
    </style:style>
    <style:style style:name="P2" style:family="paragraph" style:parent-style-name="Standard">
      <loext:graphic-properties draw:fill="solid" draw:fill-color="#1f3a5f"/>
      <style:paragraph-properties fo:margin-top="0.176cm" fo:margin-bottom="0.529cm" style:contextual-spacing="false" fo:text-align="center" style:justify-single-word="false" fo:background-color="#1f3a5f" fo:padding-left="0cm" fo:padding-right="0cm" fo:padding-top="0cm" fo:padding-bottom="0.282cm" fo:border-left="none" fo:border-right="none" fo:border-top="none" fo:border-bottom="0.26pt solid #1f3a5f"/>
      <style:text-properties fo:color="#fbf1dd" loext:opacity="100%" style:font-name="Microsoft JhengHei" fo:font-size="12pt" fo:font-style="italic" style:font-name-asian="Microsoft JhengHei1" style:font-size-asian="12pt" style:font-style-asian="italic" style:font-name-complex="Microsoft JhengHei1" style:font-size-complex="12pt" style:font-style-complex="italic"/>
    </style:style>
    <style:style style:name="P3" style:family="paragraph" style:parent-style-name="Standard">
      <style:paragraph-properties fo:margin-top="0.706cm" fo:margin-bottom="0.353cm" style:contextual-spacing="false" fo:padding-left="0cm" fo:padding-right="0cm" fo:padding-top="0cm" fo:padding-bottom="0.141cm" fo:border-left="none" fo:border-right="none" fo:border-top="none" fo:border-bottom="1.5pt solid #d9760a"/>
      <style:text-properties fo:color="#1f3a5f" loext:opacity="100%"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4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.141cm" fo:padding-bottom="0cm" fo:border-left="none" fo:border-right="none" fo:border-top="0.74pt solid #b9b9b9" fo:border-bottom="none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5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6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cm" fo:padding-bottom="0.141cm" fo:border-left="none" fo:border-right="none" fo:border-top="none" fo:border-bottom="0.74pt solid #b9b9b9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7" style:family="paragraph" style:parent-style-name="Standard">
      <style:paragraph-properties fo:margin-top="0.212cm" fo:margin-bottom="0.106cm" style:contextual-spacing="false" fo:text-align="center" style:justify-single-word="false"/>
      <style:text-properties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P8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.212cm" fo:padding-bottom="0cm" fo:border-left="none" fo:border-right="none" fo:border-top="1.25pt solid #c0392b" fo:border-bottom="none"/>
      <style:text-properties fo:color="#c0392b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9" style:family="paragraph" style:parent-style-name="Standard">
      <loext:graphic-properties draw:fill="solid" draw:fill-color="#fdecea"/>
      <style:paragraph-properties fo:margin-top="0cm" fo:margin-bottom="0.071cm" style:contextual-spacing="false" fo:background-color="#fdece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0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cm" fo:padding-bottom="0.212cm" fo:border-left="none" fo:border-right="none" fo:border-top="none" fo:border-bottom="1.25pt solid #c0392b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1" style:family="paragraph" style:parent-style-name="Standard">
      <style:paragraph-properties fo:margin-top="0.106cm" fo:margin-bottom="0.265cm" style:contextual-spacing="false"/>
      <style:text-properties style:font-name="Microsoft JhengHei" fo:font-size="10.5pt" style:font-name-asian="Microsoft JhengHei1" style:font-size-asian="10.5pt" style:font-name-complex="Microsoft JhengHei1" style:font-size-complex="10.5pt"/>
    </style:style>
    <style:style style:name="P12" style:family="paragraph" style:parent-style-name="Standard">
      <style:text-properties fo:color="#ffffff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13" style:family="paragraph" style:parent-style-name="Standard">
      <style:text-properties style:font-name="Microsoft JhengHei" fo:font-size="10pt" style:font-name-asian="Microsoft JhengHei1" style:font-size-asian="10pt" style:font-name-complex="Microsoft JhengHei1" style:font-size-complex="10pt"/>
    </style:style>
    <style:style style:name="P14" style:family="paragraph" style:parent-style-name="Standard">
      <style:paragraph-properties fo:margin-top="0.529cm" fo:margin-bottom="0.212cm" style:contextual-spacing="false"/>
      <style:text-properties fo:color="#1f3a5f" loext:opacity="100%" style:font-name="Microsoft JhengHei" fo:font-size="12.5pt" fo:font-weight="bold" style:font-name-asian="Microsoft JhengHei1" style:font-size-asian="12.5pt" style:font-weight-asian="bold" style:font-name-complex="Microsoft JhengHei1" style:font-size-complex="12.5pt" style:font-weight-complex="bold"/>
    </style:style>
    <style:style style:name="P15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.141cm" fo:padding-bottom="0.141cm" fo:border-left="none" fo:border-right="none" fo:border-top="0.74pt solid #b9b9b9" fo:border-bottom="0.74pt solid #b9b9b9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16" style:family="paragraph" style:parent-style-name="Standard">
      <loext:graphic-properties draw:fill="solid" draw:fill-color="#e8f1fa"/>
      <style:paragraph-properties fo:margin-top="0cm" fo:margin-bottom="0.141cm" style:contextual-spacing="false" fo:background-color="#e8f1fa" fo:padding-left="0cm" fo:padding-right="0cm" fo:padding-top="0.212cm" fo:padding-bottom="0cm" fo:border-left="none" fo:border-right="none" fo:border-top="1.25pt solid #2e6da4" fo:border-bottom="none"/>
      <style:text-properties fo:color="#2e6da4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17" style:family="paragraph" style:parent-style-name="Standard">
      <loext:graphic-properties draw:fill="solid" draw:fill-color="#e8f1fa"/>
      <style:paragraph-properties fo:margin-top="0cm" fo:margin-bottom="0.071cm" style:contextual-spacing="false" fo:background-color="#e8f1f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8" style:family="paragraph" style:parent-style-name="Standard">
      <loext:graphic-properties draw:fill="solid" draw:fill-color="#e8f1fa"/>
      <style:paragraph-properties fo:margin-top="0cm" fo:margin-bottom="0.141cm" style:contextual-spacing="false" fo:background-color="#e8f1fa" fo:padding-left="0cm" fo:padding-right="0cm" fo:padding-top="0cm" fo:padding-bottom="0.212cm" fo:border-left="none" fo:border-right="none" fo:border-top="none" fo:border-bottom="1.25pt solid #2e6da4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9" style:family="paragraph" style:parent-style-name="Standard">
      <style:paragraph-properties fo:margin-top="0.529cm" fo:margin-bottom="0.212cm" style:contextual-spacing="false"/>
    </style:style>
    <style:style style:name="P20" style:family="paragraph" style:parent-style-name="Standard">
      <style:text-properties style:font-name="Microsoft JhengHei" fo:font-size="10pt" fo:font-weight="bold" fo:background-color="#ffea00" style:font-name-asian="Microsoft JhengHei1" style:font-size-asian="10pt" style:font-weight-asian="bold" style:font-name-complex="Microsoft JhengHei1" style:font-size-complex="10pt" style:font-weight-complex="bold"/>
    </style:style>
    <style:style style:name="P21" style:family="paragraph" style:parent-style-name="Standard">
      <loext:graphic-properties draw:fill="solid" draw:fill-color="#fff6e5"/>
      <style:paragraph-properties fo:margin-top="0cm" fo:margin-bottom="0.141cm" style:contextual-spacing="false" fo:background-color="#fff6e5" fo:padding-left="0cm" fo:padding-right="0cm" fo:padding-top="0.212cm" fo:padding-bottom="0cm" fo:border-left="none" fo:border-right="none" fo:border-top="1.25pt solid #d9760a" fo:border-bottom="none"/>
      <style:text-properties fo:color="#d9760a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2" style:family="paragraph" style:parent-style-name="Standard">
      <loext:graphic-properties draw:fill="solid" draw:fill-color="#fff6e5"/>
      <style:paragraph-properties fo:margin-top="0cm" fo:margin-bottom="0.071cm" style:contextual-spacing="false" fo:background-color="#fff6e5"/>
      <style:text-properties fo:color="#18ffff" loext:opacity="100%" style:font-name="Microsoft JhengHei" fo:font-size="10.5pt" fo:font-weight="bold" fo:background-color="#d500f9" style:font-name-asian="Microsoft JhengHei1" style:font-size-asian="10.5pt" style:font-weight-asian="bold" style:font-name-complex="Microsoft JhengHei1" style:font-size-complex="10.5pt" style:font-weight-complex="bold"/>
    </style:style>
    <style:style style:name="P23" style:family="paragraph" style:parent-style-name="Standard">
      <loext:graphic-properties draw:fill="solid" draw:fill-color="#fff6e5"/>
      <style:paragraph-properties fo:margin-top="0cm" fo:margin-bottom="0.071cm" style:contextual-spacing="false" fo:background-color="#fff6e5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4" style:family="paragraph" style:parent-style-name="Standard">
      <loext:graphic-properties draw:fill="solid" draw:fill-color="#fff6e5"/>
      <style:paragraph-properties fo:margin-top="0cm" fo:margin-bottom="0.141cm" style:contextual-spacing="false" fo:background-color="#fff6e5" fo:padding-left="0cm" fo:padding-right="0cm" fo:padding-top="0cm" fo:padding-bottom="0.212cm" fo:border-left="none" fo:border-right="none" fo:border-top="none" fo:border-bottom="1.25pt solid #d9760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5" style:family="paragraph" style:parent-style-name="Standard">
      <style:text-properties fo:color="#ff1744" loext:opacity="100%" style:font-name="Microsoft JhengHei" fo:font-size="10pt" fo:font-weight="bold" fo:background-color="#ffea00" style:font-name-asian="Microsoft JhengHei1" style:font-size-asian="10pt" style:font-weight-asian="bold" style:font-name-complex="Microsoft JhengHei1" style:font-size-complex="10pt" style:font-weight-complex="bold"/>
    </style:style>
    <style:style style:name="P26" style:family="paragraph" style:parent-style-name="Standard">
      <loext:graphic-properties draw:fill="solid" draw:fill-color="#e9f7ef"/>
      <style:paragraph-properties fo:margin-top="0cm" fo:margin-bottom="0.141cm" style:contextual-spacing="false" fo:background-color="#e9f7ef" fo:padding-left="0cm" fo:padding-right="0cm" fo:padding-top="0.212cm" fo:padding-bottom="0cm" fo:border-left="none" fo:border-right="none" fo:border-top="1.25pt solid #2e8b57" fo:border-bottom="none"/>
      <style:text-properties fo:color="#2e8b57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7" style:family="paragraph" style:parent-style-name="Standard">
      <loext:graphic-properties draw:fill="solid" draw:fill-color="#e9f7ef"/>
      <style:paragraph-properties fo:margin-top="0cm" fo:margin-bottom="0.141cm" style:contextual-spacing="false" fo:background-color="#e9f7ef" fo:padding-left="0cm" fo:padding-right="0cm" fo:padding-top="0cm" fo:padding-bottom="0.212cm" fo:border-left="none" fo:border-right="none" fo:border-top="none" fo:border-bottom="1.25pt solid #2e8b57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8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cm" fo:padding-bottom="0.212cm" fo:border-left="none" fo:border-right="none" fo:border-top="none" fo:border-bottom="1.25pt solid #c0392b"/>
    </style:style>
    <style:style style:name="P29" style:family="paragraph" style:parent-style-name="Standard">
      <loext:graphic-properties draw:fill="solid" draw:fill-color="#e9f7ef"/>
      <style:paragraph-properties fo:margin-top="0cm" fo:margin-bottom="0.071cm" style:contextual-spacing="false" fo:background-color="#e9f7ef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T1" style:family="text">
      <style:text-properties style:font-name="Microsoft JhengHei" fo:font-size="10pt" style:font-name-asian="Microsoft JhengHei1" style:font-size-asian="10pt" style:font-name-complex="Microsoft JhengHei1" style:font-size-complex="10pt"/>
    </style:style>
    <style:style style:name="T2" style:family="text">
      <style:text-properties fo:color="#18ffff" loext:opacity="100%" style:font-name="Microsoft JhengHei" fo:font-size="10pt" fo:font-weight="bold" fo:background-color="#d500f9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3" style:family="text">
      <style:text-properties fo:color="#ffea00" loext:opacity="100%" style:font-name="Microsoft JhengHei" fo:font-size="10pt" fo:font-weight="bold" fo:background-color="#3d5afe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4" style:family="text">
      <style:text-properties fo:color="#76ff03" loext:opacity="100%" style:font-name="Microsoft JhengHei" fo:font-size="10pt" fo:font-weight="bold" fo:background-color="#1b5e20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5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ff00" loext:opacity="100%" fo:font-weight="bold" fo:background-color="#e65100" loext:char-shading-value="0" style:font-weight-asian="bold" style:font-weight-complex="bold"/>
    </style:style>
    <style:style style:name="T7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8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9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10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2" style:family="text">
      <style:text-properties fo:color="#64ffda" loext:opacity="100%" fo:font-weight="bold" fo:background-color="#4a148c" loext:char-shading-value="0" style:font-weight-asian="bold" style:font-weight-complex="bold"/>
    </style:style>
    <style:style style:name="T13" style:family="text">
      <style:text-properties fo:color="#e040fb" loext:opacity="100%" fo:font-weight="bold" fo:background-color="#4a148c" loext:char-shading-value="0" style:font-weight-asian="bold" style:font-weight-complex="bold"/>
    </style:style>
    <style:style style:name="T14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15" style:family="text">
      <style:text-properties fo:color="#1f3a5f" loext:opacity="100%" style:font-name="Microsoft JhengHei" fo:font-size="12.5pt" fo:font-weight="bold" style:font-name-asian="Microsoft JhengHei1" style:font-size-asian="12.5pt" style:font-weight-asian="bold" style:font-name-complex="Microsoft JhengHei1" style:font-size-complex="12.5pt" style:font-weight-complex="bold"/>
    </style:style>
    <style:style style:name="T16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8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9" style:family="text">
      <style:text-properties fo:color="#ffff00" loext:opacity="100%" fo:font-weight="bold" fo:background-color="#ff4081" loext:char-shading-value="0" style:font-weight-asian="bold" style:font-weight-complex="bold"/>
    </style:style>
    <style:style style:name="T20" style:family="text">
      <style:text-properties fo:color="#64ffda" loext:opacity="100%" fo:font-weight="bold" fo:background-color="#311b92" loext:char-shading-value="0" style:font-weight-asian="bold" style:font-weight-complex="bold"/>
    </style:style>
    <style:style style:name="T21" style:family="text">
      <style:text-properties fo:color="#18ffff" loext:opacity="100%" fo:background-color="#1a237e" loext:char-shading-value="0"/>
    </style:style>
    <style:style style:name="T22" style:family="text">
      <style:text-properties fo:color="#76ff03" loext:opacity="100%" fo:background-color="#1b5e20" loext:char-shading-value="0"/>
    </style:style>
    <style:style style:name="T23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24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2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6" style:family="text">
      <style:text-properties fo:color="#ffea00" loext:opacity="100%" fo:font-weight="bold" fo:background-color="#ef6c00" loext:char-shading-value="0" style:font-weight-asian="bold" style:font-weight-complex="bold"/>
    </style:style>
    <style:style style:name="T27" style:family="text">
      <style:text-properties fo:background-color="#ffc400" loext:char-shading-value="0"/>
    </style:style>
    <style:style style:name="T28" style:family="text">
      <style:text-properties fo:color="#18ffff" loext:opacity="100%" style:font-name="Microsoft JhengHei" fo:font-size="10.5pt" fo:font-weight="bold" fo:background-color="#d500f9" loext:char-shading-value="0" style:font-name-asian="Microsoft JhengHei1" style:font-size-asian="10.5pt" style:font-weight-asian="bold" style:font-name-complex="Microsoft JhengHei1" style:font-size-complex="10.5pt" style:font-weight-complex="bold"/>
    </style:style>
    <style:style style:name="T29" style:family="text">
      <style:text-properties fo:color="#76ff03" loext:opacity="100%" style:font-name="Microsoft JhengHei" fo:font-size="10.5pt" fo:font-weight="bold" fo:background-color="#1b5e20" loext:char-shading-value="0" style:font-name-asian="Microsoft JhengHei1" style:font-size-asian="10.5pt" style:font-weight-asian="bold" style:font-name-complex="Microsoft JhengHei1" style:font-size-complex="10.5pt" style:font-weight-complex="bold"/>
    </style:style>
    <style:style style:name="T30" style:family="text"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ll Script 資料夾權限檢查</text:p>
      <text:p text:style-name="P2">逐行解析 × 符號大全 × 錯誤修正 × 完整補充</text:p>
      <text:p text:style-name="P3">📄 完整程式碼（原始版本）</text:p>
      <text:p text:style-name="P4">#!/bin/bash</text:p>
      <text:p text:style-name="P5">read -p "please input the directory name : " dir</text:p>
      <text:p text:style-name="P5">test ! -e $dir &amp;&amp; echo "$dir is not exist" &amp;&amp; exit 1</text:p>
      <text:p text:style-name="P5">test ! -d $dir &amp;&amp; echo "$dir is not a directory" &amp;&amp; exit 1</text:p>
      <text:p text:style-name="P5">test -r $dir &amp;&amp; echo "$USER can read the $dir"</text:p>
      <text:p text:style-name="P5">test -w $dir &amp;&amp; echo "$USER can write the $dir"</text:p>
      <text:p text:style-name="P6">test -x $dir &amp;&amp; echo "$USER can execution the $dir"</text:p>
      <text:p text:style-name="P7">整體功能：① 要求使用者輸入資料夾名稱 → ② 確認它存在且是資料夾 → ③ 逐一印出讀 / 寫 / 進入 權限</text:p>
      <text:p text:style-name="P8">⚠️ 這是原始版本，含有已知問題</text:p>
      <text:p text:style-name="P9">此版本刻意保留原始寫法，方便對照學習：包含 2 個英文文法錯誤（is not exist、can execution）、變數未加引號等問題。</text:p>
      <text:p text:style-name="P10">以下逐段拆解說明，並在文末提供修正後的完整版本。</text:p>
      <text:p text:style-name="P3">🔍 原始說明正確性核查</text:p>
      <text:p text:style-name="P11">以下針對每個說明點進行驗證，標示是否正確、遺漏或需要補充：</text:p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 table:style-name="表格1.1">
            <table:table-cell table:style-name="表格1.A1" office:value-type="string">
              <text:p text:style-name="P12">說明點</text:p>
            </table:table-cell>
            <table:table-cell table:style-name="表格1.A1" office:value-type="string">
              <text:p text:style-name="P12">判定</text:p>
            </table:table-cell>
            <table:table-cell table:style-name="表格1.A1" office:value-type="string">
              <text:p text:style-name="P12">補充 / 修正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13">#!/bin/bash</text:p>
          </table:table-cell>
          <table:table-cell table:style-name="表格1.A2" office:value-type="string">
            <text:p text:style-name="P13">✅ 正確</text:p>
          </table:table-cell>
          <table:table-cell table:style-name="表格1.A2" office:value-type="string">
            <text:p text:style-name="P13">可補充：#! 是核心讀取的特殊序列；若用 bash script.sh 執行則不需要 shebang。</text:p>
          </table:table-cell>
        </table:table-row>
        <table:table-row table:style-name="表格1.1">
          <table:table-cell table:style-name="表格1.A3" office:value-type="string">
            <text:p text:style-name="P13">read -p</text:p>
          </table:table-cell>
          <table:table-cell table:style-name="表格1.A3" office:value-type="string">
            <text:p text:style-name="P13">✅ 正確</text:p>
          </table:table-cell>
          <table:table-cell table:style-name="表格1.A3" office:value-type="string">
            <text:p text:style-name="P13">補充說明：若資料夾名稱含空格，$dir 未加引號會出錯，應寫成 "$dir"。</text:p>
          </table:table-cell>
        </table:table-row>
        <table:table-row table:style-name="表格1.1">
          <table:table-cell table:style-name="表格1.A2" office:value-type="string">
            <text:p text:style-name="P13">&amp;&amp; exit 1 的原因</text:p>
          </table:table-cell>
          <table:table-cell table:style-name="表格1.A2" office:value-type="string">
            <text:p text:style-name="P13">⚠️ 不夠清楚</text:p>
          </table:table-cell>
          <table:table-cell table:style-name="表格1.A2" office:value-type="string">
            <text:p text:style-name="P13">原說明只提到「前面成立才執行後面」，未說明為何 exit 1 前要再加 &amp;&amp;（不用分號）。原因見下方詳細解說。</text:p>
          </table:table-cell>
        </table:table-row>
        <table:table-row table:style-name="表格1.1">
          <table:table-cell table:style-name="表格1.A3" office:value-type="string">
            <text:p text:style-name="P13">exit 1 的數字意義</text:p>
          </table:table-cell>
          <table:table-cell table:style-name="表格1.A3" office:value-type="string">
            <text:p text:style-name="P13">❌ 遺漏</text:p>
          </table:table-cell>
          <table:table-cell table:style-name="表格1.A3" office:value-type="string">
            <text:p text:style-name="P13">原說明未解釋數字 1 的意義。exit 0 = 成功；exit 非 0 = 錯誤；1 是最常見的錯誤代碼。</text:p>
          </table:table-cell>
        </table:table-row>
        <table:table-row table:style-name="表格1.1">
          <table:table-cell table:style-name="表格1.A2" office:value-type="string">
            <text:p text:style-name="P13">-e vs -d 的差別</text:p>
          </table:table-cell>
          <table:table-cell table:style-name="表格1.A2" office:value-type="string">
            <text:p text:style-name="P13">⚠️ 不夠清楚</text:p>
          </table:table-cell>
          <table:table-cell table:style-name="表格1.A2" office:value-type="string">
            <text:p text:style-name="P13">原說明分開介紹，但未解釋「為何要檢查兩次」。-e 抓「完全不存在」，-d 抓「存在但是檔案而非資料夾」。</text:p>
          </table:table-cell>
        </table:table-row>
        <table:table-row table:style-name="表格1.1">
          <table:table-cell table:style-name="表格1.A3" office:value-type="string">
            <text:p text:style-name="Standard"><text:span text:style-name="T1">-x 對資料夾的意</text:span><text:soft-page-break/><text:span text:style-name="T1">義</text:span></text:p>
          </table:table-cell>
          <table:table-cell table:style-name="表格1.A3" office:value-type="string">
            <text:p text:style-name="P13">⚠️ 不夠清楚</text:p>
          </table:table-cell>
          <table:table-cell table:style-name="表格1.A3" office:value-type="string">
            <text:p text:style-name="Standard"><text:span text:style-name="T1">原說明提到「可進入」但不夠深入。對資料夾而言 </text:span><text:span text:style-name="T2">x = traverse（穿</text:span><text:soft-page-break/><text:span text:style-name="T2">越）權限</text:span><text:span text:style-name="T1">，</text:span><text:span text:style-name="T3">即 cd 能否進入</text:span><text:span text:style-name="T1">；</text:span><text:span text:style-name="T4">沒有 x 即使有 r 也不能 cd</text:span><text:span text:style-name="T1">。</text:span></text:p>
          </table:table-cell>
        </table:table-row>
        <table:table-row table:style-name="表格1.1">
          <table:table-cell table:style-name="表格1.A2" office:value-type="string">
            <text:p text:style-name="P13">$USER 變數</text:p>
          </table:table-cell>
          <table:table-cell table:style-name="表格1.A2" office:value-type="string">
            <text:p text:style-name="P13">⚠️ 不夠清楚</text:p>
          </table:table-cell>
          <table:table-cell table:style-name="表格1.A2" office:value-type="string">
            <text:p text:style-name="P13">原說明正確指出是「目前登入使用者」，但未說明它是 shell 自動設定的環境變數，不需要自己宣告。</text:p>
          </table:table-cell>
        </table:table-row>
        <table:table-row table:style-name="表格1.1">
          <table:table-cell table:style-name="表格1.A3" office:value-type="string">
            <text:p text:style-name="P13">test 的另一種寫法</text:p>
          </table:table-cell>
          <table:table-cell table:style-name="表格1.A3" office:value-type="string">
            <text:p text:style-name="P13">❌ 遺漏</text:p>
          </table:table-cell>
          <table:table-cell table:style-name="表格1.A3" office:value-type="string">
            <text:p text:style-name="P13">原說明未提到：<text:span text:style-name="T5">test 指令可以完全用 [ ] 方括號取代</text:span>，例如 <text:span text:style-name="T6">[ ! -e "$dir" ]</text:span>，這在實際程式碼中更常見。</text:p>
          </table:table-cell>
        </table:table-row>
        <table:table-row table:style-name="表格1.1">
          <table:table-cell table:style-name="表格1.A2" office:value-type="string">
            <text:p text:style-name="P13">變數引號問題</text:p>
          </table:table-cell>
          <table:table-cell table:style-name="表格1.A2" office:value-type="string">
            <text:p text:style-name="P13">❌ 遺漏</text:p>
          </table:table-cell>
          <table:table-cell table:style-name="表格1.A2" office:value-type="string">
            <text:p text:style-name="P13"><text:span text:style-name="T7">$dir 若目錄名含空格會被拆成兩個參數</text:span>，應寫成 "$dir"。這是實務上很重要的一個坑。</text:p>
          </table:table-cell>
        </table:table-row>
      </table:table>
      <text:p text:style-name="P3">🧩 逐行超詳細解說（補足版）</text:p>
      <text:p text:style-name="P14">① Shebang（第一行）</text:p>
      <text:p text:style-name="P15">#!/bin/bash</text:p>
      <table:table table:name="表格2" table:style-name="表格2">
        <table:table-column table:style-name="表格2.A"/>
        <table:table-column table:style-name="表格2.B"/>
        <table:table-header-rows>
          <table:table-row table:style-name="表格2.1">
            <table:table-cell table:style-name="表格2.A1" office:value-type="string">
              <text:p text:style-name="P12">符號 / 部分</text:p>
            </table:table-cell>
            <table:table-cell table:style-name="表格2.A1" office:value-type="string">
              <text:p text:style-name="P12">說明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3">#!</text:p>
          </table:table-cell>
          <table:table-cell table:style-name="表格2.A2" office:value-type="string">
            <text:p text:style-name="P13">「Shebang」。更精確地說：<text:span text:style-name="T8">核心（kernel）看到 #! 之後，會依照它指定的路徑去呼叫對應的直譯器來執行這個檔案</text:span>，而不是 bash 自己解析這一行。</text:p>
          </table:table-cell>
        </table:table-row>
        <table:table-row table:style-name="表格2.1">
          <table:table-cell table:style-name="表格2.A3" office:value-type="string">
            <text:p text:style-name="P13">/bin/bash</text:p>
          </table:table-cell>
          <table:table-cell table:style-name="表格2.A3" office:value-type="string">
            <text:p text:style-name="P13"><text:span text:style-name="T9">bash 直譯器的路徑</text:span>，執行這份 script 的程式</text:p>
          </table:table-cell>
        </table:table-row>
      </table:table>
      <text:p text:style-name="P16">💡 補充說明</text:p>
      <text:p text:style-name="P17">補充一：<text:span text:style-name="T10">若你改用 bash script.sh 方式執行，這行可省略，因為你已明確指定用 bash</text:span>。</text:p>
      <text:p text:style-name="P18">補充二：若改成 #!/bin/sh 則使用更基本的 POSIX sh，不一定支援 bash 特有語法。</text:p>
      <text:p text:style-name="P14">② read（讀取使用者輸入）</text:p>
      <text:p text:style-name="P15">read -p "please input the directory name : " dir</text:p>
      <table:table table:name="表格3" table:style-name="表格3">
        <table:table-column table:style-name="表格3.A"/>
        <table:table-column table:style-name="表格3.B"/>
        <table:table-header-rows>
          <table:table-row table:style-name="表格3.1">
            <table:table-cell table:style-name="表格3.A1" office:value-type="string">
              <text:p text:style-name="P12">符號 / 部分</text:p>
            </table:table-cell>
            <table:table-cell table:style-name="表格3.A1" office:value-type="string">
              <text:p text:style-name="P12">說明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13">read</text:p>
          </table:table-cell>
          <table:table-cell table:style-name="表格3.A2" office:value-type="string">
            <text:p text:style-name="P13"><text:span text:style-name="T5">bash 內建指令（builtin）</text:span>，並非外部的 Linux 指令，<text:span text:style-name="T11">等待使用者輸入並存入變數</text:span></text:p>
          </table:table-cell>
        </table:table-row>
        <table:table-row table:style-name="表格3.1">
          <table:table-cell table:style-name="表格3.A3" office:value-type="string">
            <text:p text:style-name="P13">-p</text:p>
          </table:table-cell>
          <table:table-cell table:style-name="表格3.A3" office:value-type="string">
            <text:p text:style-name="P13">prompt 的縮寫，<text:span text:style-name="T12">顯示提示文字後才等輸入</text:span><text:span text:style-name="T13">（不會換行）</text:span></text:p>
          </table:table-cell>
        </table:table-row>
        <table:table-row table:style-name="表格3.1">
          <table:table-cell table:style-name="表格3.A2" office:value-type="string">
            <text:p text:style-name="P13">"..."</text:p>
          </table:table-cell>
          <table:table-cell table:style-name="表格3.A2" office:value-type="string">
            <text:p text:style-name="P13">顯示給使用者看的提示訊息，冒號和空格是為了好看</text:p>
          </table:table-cell>
        </table:table-row>
        <table:table-row table:style-name="表格3.1">
          <table:table-cell table:style-name="表格3.A3" office:value-type="string">
            <text:p text:style-name="P13">dir</text:p>
          </table:table-cell>
          <table:table-cell table:style-name="表格3.A3" office:value-type="string">
            <text:p text:style-name="P13">自訂的變數名稱，<text:span text:style-name="T10">使用者輸入的內容會存進來</text:span></text:p>
          </table:table-cell>
        </table:table-row>
      </table:table>
      <text:p text:style-name="P8">⚠️ 重要補充</text:p>
      <text:p text:style-name="P10">如果<text:span text:style-name="T14">使用者輸入的資料夾名稱包含空格（例如 my folder）</text:span>，後面的 $dir 沒有加引號會被 shell 拆成兩個參數，導致出錯。正確寫法應該是 "$dir"。</text:p>
      <text:p text:style-name="P19"><text:soft-page-break/><text:span text:style-name="T15">③ test ! -e（檢查是否存在）</text:span></text:p>
      <text:p text:style-name="P15">test ! -e $dir &amp;&amp; echo "$dir is not exist" &amp;&amp; exit 1</text:p>
      <table:table table:name="表格4" table:style-name="表格4">
        <table:table-column table:style-name="表格4.A"/>
        <table:table-column table:style-name="表格4.B"/>
        <table:table-header-rows>
          <table:table-row table:style-name="表格4.1">
            <table:table-cell table:style-name="表格4.A1" office:value-type="string">
              <text:p text:style-name="P12">符號 / 部分</text:p>
            </table:table-cell>
            <table:table-cell table:style-name="表格4.A1" office:value-type="string">
              <text:p text:style-name="P12">說明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13">test</text:p>
          </table:table-cell>
          <table:table-cell table:style-name="表格4.A2" office:value-type="string">
            <text:p text:style-name="P13">條件測試指令，<text:span text:style-name="T16">根據結果回傳 0（成功）或非 0（失敗，通常為 1</text:span>；語法錯誤時可能是其他數值，例如 2）給 shell</text:p>
          </table:table-cell>
        </table:table-row>
        <table:table-row table:style-name="表格4.1">
          <table:table-cell table:style-name="表格4.A3" office:value-type="string">
            <text:p text:style-name="P13">!</text:p>
          </table:table-cell>
          <table:table-cell table:style-name="表格4.A3" office:value-type="string">
            <text:p text:style-name="P13">邏輯 NOT（反轉）：把成功變失敗、失敗變成功</text:p>
          </table:table-cell>
        </table:table-row>
        <table:table-row table:style-name="表格4.1">
          <table:table-cell table:style-name="表格4.A2" office:value-type="string">
            <text:p text:style-name="P13">-e</text:p>
          </table:table-cell>
          <table:table-cell table:style-name="表格4.A2" office:value-type="string">
            <text:p text:style-name="P13">exist：檢查路徑是否存在（檔案或資料夾都算）</text:p>
          </table:table-cell>
        </table:table-row>
        <table:table-row table:style-name="表格4.1">
          <table:table-cell table:style-name="表格4.A3" office:value-type="string">
            <text:p text:style-name="P20">$dir</text:p>
          </table:table-cell>
          <table:table-cell table:style-name="表格4.A3" office:value-type="string">
            <text:p text:style-name="P13"><text:span text:style-name="T14">取得變數 dir 的值</text:span>（<text:span text:style-name="T17">使用者剛才輸入的名稱</text:span>）</text:p>
          </table:table-cell>
        </table:table-row>
        <table:table-row table:style-name="表格4.1">
          <table:table-cell table:style-name="表格4.A2" office:value-type="string">
            <text:p text:style-name="P20">&amp;&amp;</text:p>
          </table:table-cell>
          <table:table-cell table:style-name="表格4.A2" office:value-type="string">
            <text:p text:style-name="P13">AND 短路運算：<text:span text:style-name="T11">左邊指令成功（回傳 0）才執行右邊</text:span></text:p>
          </table:table-cell>
        </table:table-row>
        <table:table-row table:style-name="表格4.1">
          <table:table-cell table:style-name="表格4.A3" office:value-type="string">
            <text:p text:style-name="P13">exit 1</text:p>
          </table:table-cell>
          <table:table-cell table:style-name="表格4.A3" office:value-type="string">
            <text:p text:style-name="P13">結束程式。數字 1 是錯誤代碼（<text:span text:style-name="T18">exit 0 = 正常結束</text:span>）</text:p>
          </table:table-cell>
        </table:table-row>
      </table:table>
      <text:p text:style-name="P16">❓ 為什麼 exit 1 前面也要用 &amp;&amp; 而不是用 ; ？</text:p>
      <text:p text:style-name="P17"><text:span text:style-name="T19">用 ; 也可以正常運作，效果幾乎相同</text:span>。<text:span text:style-name="T20">用 &amp;&amp; 只是一種寫作風格，讓語意看起來像「前面的 echo 也要成功，才繼續 exit</text:span>」——但這並非嚴格意義上的「防禦性程式設計」，<text:span text:style-name="T8">因為 echo 幾乎永遠回傳 0（成功），用 ; 或 &amp;&amp; 實際執行結果沒有差別</text:span>。</text:p>
      <text:p text:style-name="P18">很多大型專案的錯誤處理仍然直接寫成兩行 echo / exit，並不是規定一定要用 &amp;&amp;。</text:p>
      <text:p text:style-name="P21">🎯 exit 數字代碼說明</text:p>
      <text:p text:style-name="P22">exit 0 → 正常結束，代表程式執行成功</text:p>
      <text:p text:style-name="P22">exit 1 → 錯誤結束（最通用的錯誤代碼）</text:p>
      <text:p text:style-name="P23">exit 2 → 許多 GNU 工具習慣用來代表「使用方式錯誤」（如參數不對），但這只是社群慣例，並非 shell 本身的規定；除了 0 之外，其餘數字都可由程式自行定義。</text:p>
      <text:p text:style-name="P24">父程式或腳本呼叫此 script 時，可以用 $? 取得這個數字來判斷是否成功。</text:p>
      <text:p text:style-name="P14">④ test ! -d（檢查是否為資料夾）</text:p>
      <text:p text:style-name="P15">test ! -d $dir &amp;&amp; echo "$dir is not a directory" &amp;&amp; exit 1</text:p>
      <table:table table:name="表格5" table:style-name="表格5">
        <table:table-column table:style-name="表格5.A"/>
        <table:table-column table:style-name="表格5.B"/>
        <table:table-header-rows>
          <table:table-row table:style-name="表格5.1">
            <table:table-cell table:style-name="表格5.A1" office:value-type="string">
              <text:p text:style-name="P12">符號 / 部分</text:p>
            </table:table-cell>
            <table:table-cell table:style-name="表格5.A1" office:value-type="string">
              <text:p text:style-name="P12">說明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25">-d</text:p>
          </table:table-cell>
          <table:table-cell table:style-name="表格5.A2" office:value-type="string">
            <text:p text:style-name="P25"><text:span text:style-name="T21">directory</text:span>：<text:span text:style-name="T22">檢查路徑是否為「資料夾」</text:span>（而非普通檔案）</text:p>
          </table:table-cell>
        </table:table-row>
      </table:table>
      <text:p text:style-name="P16">💡 為什麼需要分兩步檢查？</text:p>
      <text:p text:style-name="P17">第 ③ 步<text:span text:style-name="T8"> (-e)：抓「根本不存在」的情況</text:span>，例如拼錯字、路徑不對。</text:p>
      <text:p text:style-name="P17">第 ④ 步 <text:span text:style-name="T8">(-d)：抓「存在，但是檔案，不是資料夾」的情況</text:span>。例如輸入了 /etc/hosts（這是一個檔案）。</text:p>
      <text:p text:style-name="P18"><text:span text:style-name="T23">少了第 ③ 步直接做 -d，若路徑不存在，-d 也會回傳失敗，錯誤訊息會說「不是資料夾」，但實際上是「根本不存在」，讓人困惑</text:span>。分開兩步才能給出精確的錯誤訊息。</text:p>
      <text:p text:style-name="P19"><text:soft-page-break/><text:span text:style-name="T15">⑤⑥⑦ 權限檢查（-r / -w / -x）</text:span></text:p>
      <text:p text:style-name="P4">test -r $dir &amp;&amp; echo "$USER can read the $dir"</text:p>
      <text:p text:style-name="P5">test -w $dir &amp;&amp; echo "$USER can write the $dir"</text:p>
      <text:p text:style-name="P6">test -x $dir &amp;&amp; echo "$USER can execution the $dir"</text:p>
      <table:table table:name="表格6" table:style-name="表格6">
        <table:table-column table:style-name="表格6.A"/>
        <table:table-column table:style-name="表格6.B"/>
        <table:table-header-rows>
          <table:table-row table:style-name="表格6.1">
            <table:table-cell table:style-name="表格6.A1" office:value-type="string">
              <text:p text:style-name="P12">旗標</text:p>
            </table:table-cell>
            <table:table-cell table:style-name="表格6.A1" office:value-type="string">
              <text:p text:style-name="P12">說明</text:p>
            </table:table-cell>
          </table:table-row>
        </table:table-header-rows>
        <table:table-row table:style-name="表格6.1">
          <table:table-cell table:style-name="表格6.A2" office:value-type="string">
            <text:p text:style-name="P13">-r</text:p>
          </table:table-cell>
          <table:table-cell table:style-name="表格6.A2" office:value-type="string">
            <text:p text:style-name="P13"><text:span text:style-name="T9">read：可讀取目錄項目名稱（如用 ls 列出檔名）</text:span>；但要取得完整資訊（如 ls -l 顯示的大小、權限）仍需搭配 x 權限</text:p>
          </table:table-cell>
        </table:table-row>
        <table:table-row table:style-name="表格6.1">
          <table:table-cell table:style-name="表格6.A3" office:value-type="string">
            <text:p text:style-name="P13">-w</text:p>
          </table:table-cell>
          <table:table-cell table:style-name="表格6.A3" office:value-type="string">
            <text:p text:style-name="P13"><text:span text:style-name="T9">write：目前使用者是否有「寫入」權限</text:span>（可在資料夾內新增／刪除／重新命名檔案）</text:p>
          </table:table-cell>
        </table:table-row>
        <table:table-row table:style-name="表格6.1">
          <table:table-cell table:style-name="表格6.A2" office:value-type="string">
            <text:p text:style-name="P13">-x</text:p>
          </table:table-cell>
          <table:table-cell table:style-name="表格6.A2" office:value-type="string">
            <text:p text:style-name="P13"><text:span text:style-name="T9">execute / traverse（穿越，又稱 search）：可否「進入」資料夾（cd 進去）</text:span>，也能<text:span text:style-name="T24">存取裡面的檔案</text:span></text:p>
          </table:table-cell>
        </table:table-row>
        <table:table-row table:style-name="表格6.1">
          <table:table-cell table:style-name="表格6.A3" office:value-type="string">
            <text:p text:style-name="P13">$USER</text:p>
          </table:table-cell>
          <table:table-cell table:style-name="表格6.A3" office:value-type="string">
            <text:p text:style-name="P13">shell 自動設定的環境變數，值就是目前登入的使用者名稱</text:p>
          </table:table-cell>
        </table:table-row>
      </table:table>
      <text:p text:style-name="P8">🔑 -x 對資料夾的特殊意義（常見誤解）</text:p>
      <text:p text:style-name="P9"><text:span text:style-name="T8">對「一般檔案」：-x 代表可以執行這個程式</text:span>。</text:p>
      <text:p text:style-name="P9"><text:span text:style-name="T8">對「資料夾」：-x 代表「穿越（traverse）」權限</text:span>，也就是<text:span text:style-name="T25">能否 cd 進入</text:span>。</text:p>
      <text:p text:style-name="P9">重要：<text:span text:style-name="T26">若你有 -r 但沒有 -x，你只能用 ls（不加參數）列出檔名，無法 cd 進入</text:span>，也無法用 ls -l 取得詳細資訊（因為那需要對每個項目做 stat，而 stat 需要 x 權限），更無法讀取裡面的檔案內容。</text:p>
      <text:p text:style-name="P10">Linux 的三種權限對資料夾的意義 —— <text:span text:style-name="T12">r：可列出資料夾內的檔名；w：可在資料夾內建立／刪除／重新命名檔案；x：可 cd 進入資料夾，也能存取（stat／讀取）裡面的檔案</text:span>。</text:p>
      <text:p text:style-name="P16">💡 $USER 補充說明</text:p>
      <text:p text:style-name="P18">這是 bash 自動設好的環境變數，不需要你自己宣告。可用 echo $USER 查看目前值。類似的內建環境變數還有 $HOME（家目錄）、$SHELL（使用的 shell）、$PWD（目前路徑）等。</text:p>
      <text:p text:style-name="P8">⚠️ 注意</text:p>
      <text:p text:style-name="P10">這三行的寫法是：有權限 → 印訊息；沒有權限 → 靜默跳過（不印任何東西）。這與前面兩行不同——前面是「沒有就報錯結束」，這裡是「有才說，沒有就算了」。</text:p>
      <text:p text:style-name="P26">🔄 補充知識：<text:span text:style-name="T27">test 的另一種寫法 [ ]</text:span></text:p>
      <text:p text:style-name="P27">在實際的 shell script 中，你更常看到方括號寫法，它和 test 完全等價：</text:p>
      <table:table table:name="表格7" table:style-name="表格7">
        <table:table-column table:style-name="表格7.A" table:number-columns-repeated="2"/>
        <table:table-header-rows>
          <table:table-row table:style-name="表格7.1">
            <table:table-cell table:style-name="表格7.A1" office:value-type="string">
              <text:p text:style-name="P12">test 寫法</text:p>
            </table:table-cell>
            <table:table-cell table:style-name="表格7.A1" office:value-type="string">
              <text:p text:style-name="P12">[ ] 寫法（完全相同）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13"><text:span text:style-name="T27">test</text:span> ! -e $dir</text:p>
          </table:table-cell>
          <table:table-cell table:style-name="表格7.A2" office:value-type="string">
            <text:p text:style-name="P13"><text:span text:style-name="T27">[ </text:span>! -e "$dir" <text:span text:style-name="T27">]</text:span></text:p>
          </table:table-cell>
        </table:table-row>
        <table:table-row table:style-name="表格7.1">
          <table:table-cell table:style-name="表格7.A3" office:value-type="string">
            <text:p text:style-name="P13"><text:span text:style-name="T27">test</text:span> -r $dir</text:p>
          </table:table-cell>
          <table:table-cell table:style-name="表格7.A3" office:value-type="string">
            <text:p text:style-name="P13"><text:span text:style-name="T27">[</text:span> -r "$dir" <text:span text:style-name="T27">]</text:span></text:p>
          </table:table-cell>
        </table:table-row>
      </table:table>
      <text:p text:style-name="P8">⚠️ 使用 [ ] 時的重要規則</text:p>
      <text:p text:style-name="P28"><text:soft-page-break/><text:span text:style-name="T28">方括號裡面的空格不能省略！</text:span><text:span text:style-name="T29">[ -e "$dir" ] 是對的；[-e "$dir"] 是錯的</text:span><text:span text:style-name="T30">（會出現語法錯誤）。</text:span></text:p>
      <text:p text:style-name="P3">✅ 加入所有修正的改良版程式碼</text:p>
      <text:p text:style-name="P11">整合上述所有補充，以下是更完善的寫法：</text:p>
      <text:p text:style-name="P4">#!/bin/bash</text:p>
      <text:p text:style-name="P5">read -p "Please enter directory: " dir</text:p>
      <text:p text:style-name="P5"><text:s/></text:p>
      <text:p text:style-name="P5"># 修正1：$dir 加上引號，防止路徑含空格出錯</text:p>
      <text:p text:style-name="P5"><text:span text:style-name="T27">[ ! -e "$dir" ] </text:span>&amp;&amp; echo "$dir does not exist" &amp;&amp; exit 1</text:p>
      <text:p text:style-name="P5"><text:span text:style-name="T27">[ ! -d "$dir" ]</text:span> &amp;&amp; echo "$dir is not a directory" &amp;&amp; exit 1</text:p>
      <text:p text:style-name="P5"><text:s/></text:p>
      <text:p text:style-name="P5"># 修正2：沒有權限也印出提示，邏輯更完整</text:p>
      <text:p text:style-name="P5"><text:span text:style-name="T27">[ -r "$dir" ]</text:span> &amp;&amp; echo "$USER can read $dir" || echo "$USER cannot read $dir"</text:p>
      <text:p text:style-name="P5"><text:span text:style-name="T27">[ -w "$dir" ]</text:span> &amp;&amp; echo "$USER can write $dir" || echo "$USER cannot write $dir"</text:p>
      <text:p text:style-name="P6"><text:span text:style-name="T27">[ -x "$dir" ]</text:span> &amp;&amp; echo "$USER can enter $dir" || echo "$USER cannot enter $dir"</text:p>
      <text:p text:style-name="P26">✅ 改良重點說明</text:p>
      <text:p text:style-name="P29">"$dir" 加上引號，處理含空格的路徑名。</text:p>
      <text:p text:style-name="P29">[ ] 改用更現代的方括號寫法，與 test 等價。</text:p>
      <text:p text:style-name="P29">|| echo ... 加上「沒有權限」的提示，讓輸出更完整（|| 代表「左邊失敗才執行右邊」）。</text:p>
      <text:p text:style-name="P29">「does not exist」修正了原版英文文法錯誤（is not exist 是錯的），can execution 也改為更自然的 can enter。</text:p>
      <text:p text:style-name="P27">提示文字改為 "Please enter directory:"，更符合 Linux 使用習慣。</text:p>
      <text:p text:style-name="P8">⚠️ 重要陷阱：A &amp;&amp; B || C 不等於 if...else！</text:p>
      <text:p text:style-name="P9">很多初學者以為「[ 條件 ] &amp;&amp; 做A || 做B」完全等同於「if 條件 then A else B」。事實上不一定。</text:p>
      <text:p text:style-name="P9">如果 A 執行成功，但緊接著的 B 執行失敗，shell 仍然會接著執行 C——因為整個 &amp;&amp; 鏈結的最終結果是「失敗」，觸發了後面的 ||。</text:p>
      <text:p text:style-name="P9">例如：true &amp;&amp; false || echo hello 仍然會印出 hello，即使 true 成功了。</text:p>
      <text:p text:style-name="P10">這份程式碼裡之所以沒問題，是因為 echo 幾乎不會執行失敗，所以 [ -r "$dir" ] &amp;&amp; echo ... || echo ... 在實務上是安全的。但在一般情境中，不要把 A &amp;&amp; B || C 當成 if...else 的完全替代品，複雜邏輯建議還是用正規的 if / then / else / fi。</text:p>
      <text:p text:style-name="P3">📋 所有符號完整速查表</text:p>
      <table:table table:name="表格8" table:style-name="表格8">
        <table:table-column table:style-name="表格8.A"/>
        <table:table-column table:style-name="表格8.B"/>
        <table:table-column table:style-name="表格8.C"/>
        <table:table-header-rows>
          <table:table-row table:style-name="表格8.1">
            <table:table-cell table:style-name="表格8.A1" office:value-type="string">
              <text:p text:style-name="P12">符號</text:p>
            </table:table-cell>
            <table:table-cell table:style-name="表格8.A1" office:value-type="string">
              <text:p text:style-name="P12">名稱</text:p>
            </table:table-cell>
            <table:table-cell table:style-name="表格8.A1" office:value-type="string">
              <text:p text:style-name="P12">意義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13">$dir</text:p>
          </table:table-cell>
          <table:table-cell table:style-name="表格8.A2" office:value-type="string">
            <text:p text:style-name="P13">變數取值</text:p>
          </table:table-cell>
          <table:table-cell table:style-name="表格8.A2" office:value-type="string">
            <text:p text:style-name="P13">取出變數 dir 的值（使用者輸入的路徑）</text:p>
          </table:table-cell>
        </table:table-row>
        <text:soft-page-break/>
        <table:table-row table:style-name="表格8.1">
          <table:table-cell table:style-name="表格8.A3" office:value-type="string">
            <text:p text:style-name="P13">"$dir"</text:p>
          </table:table-cell>
          <table:table-cell table:style-name="表格8.A3" office:value-type="string">
            <text:p text:style-name="P13">帶引號的變數</text:p>
          </table:table-cell>
          <table:table-cell table:style-name="表格8.A3" office:value-type="string">
            <text:p text:style-name="P13">防止值含空格時被 shell 拆成多個參數</text:p>
          </table:table-cell>
        </table:table-row>
        <table:table-row table:style-name="表格8.1">
          <table:table-cell table:style-name="表格8.A2" office:value-type="string">
            <text:p text:style-name="P13">!</text:p>
          </table:table-cell>
          <table:table-cell table:style-name="表格8.A2" office:value-type="string">
            <text:p text:style-name="P13">邏輯 NOT</text:p>
          </table:table-cell>
          <table:table-cell table:style-name="表格8.A2" office:value-type="string">
            <text:p text:style-name="P13">反轉條件：成功→失敗，失敗→成功</text:p>
          </table:table-cell>
        </table:table-row>
        <table:table-row table:style-name="表格8.1">
          <table:table-cell table:style-name="表格8.A3" office:value-type="string">
            <text:p text:style-name="P13">&amp;&amp;</text:p>
          </table:table-cell>
          <table:table-cell table:style-name="表格8.A3" office:value-type="string">
            <text:p text:style-name="P13">邏輯 AND（短路）</text:p>
          </table:table-cell>
          <table:table-cell table:style-name="表格8.A3" office:value-type="string">
            <text:p text:style-name="P13">左邊成功（回傳 0）才執行右邊；否則跳過</text:p>
          </table:table-cell>
        </table:table-row>
        <table:table-row table:style-name="表格8.1">
          <table:table-cell table:style-name="表格8.A2" office:value-type="string">
            <text:p text:style-name="P13">||</text:p>
          </table:table-cell>
          <table:table-cell table:style-name="表格8.A2" office:value-type="string">
            <text:p text:style-name="P13">邏輯 OR（短路）</text:p>
          </table:table-cell>
          <table:table-cell table:style-name="表格8.A2" office:value-type="string">
            <text:p text:style-name="P13">左邊失敗（回傳非 0）才執行右邊</text:p>
          </table:table-cell>
        </table:table-row>
        <table:table-row table:style-name="表格8.1">
          <table:table-cell table:style-name="表格8.A3" office:value-type="string">
            <text:p text:style-name="P13">;</text:p>
          </table:table-cell>
          <table:table-cell table:style-name="表格8.A3" office:value-type="string">
            <text:p text:style-name="P13">分隔符</text:p>
          </table:table-cell>
          <table:table-cell table:style-name="表格8.A3" office:value-type="string">
            <text:p text:style-name="P13">不論前面成功或失敗，都執行後面</text:p>
          </table:table-cell>
        </table:table-row>
        <table:table-row table:style-name="表格8.1">
          <table:table-cell table:style-name="表格8.A2" office:value-type="string">
            <text:p text:style-name="P13">test</text:p>
          </table:table-cell>
          <table:table-cell table:style-name="表格8.A2" office:value-type="string">
            <text:p text:style-name="P13">條件測試指令</text:p>
          </table:table-cell>
          <table:table-cell table:style-name="表格8.A2" office:value-type="string">
            <text:p text:style-name="P13">評估條件，成功回傳 0，失敗回傳非 0（通常為 1，語法錯誤時可能為其他值）</text:p>
          </table:table-cell>
        </table:table-row>
        <table:table-row table:style-name="表格8.1">
          <table:table-cell table:style-name="表格8.A3" office:value-type="string">
            <text:p text:style-name="P13">[ ]</text:p>
          </table:table-cell>
          <table:table-cell table:style-name="表格8.A3" office:value-type="string">
            <text:p text:style-name="P13">test 的方括號寫法</text:p>
          </table:table-cell>
          <table:table-cell table:style-name="表格8.A3" office:value-type="string">
            <text:p text:style-name="P13">與 test 完全等價，注意內部空格不可省</text:p>
          </table:table-cell>
        </table:table-row>
        <table:table-row table:style-name="表格8.1">
          <table:table-cell table:style-name="表格8.A2" office:value-type="string">
            <text:p text:style-name="P13">-e</text:p>
          </table:table-cell>
          <table:table-cell table:style-name="表格8.A2" office:value-type="string">
            <text:p text:style-name="P13">exist</text:p>
          </table:table-cell>
          <table:table-cell table:style-name="表格8.A2" office:value-type="string">
            <text:p text:style-name="P13">路徑是否存在（檔案或資料夾皆可）</text:p>
          </table:table-cell>
        </table:table-row>
        <table:table-row table:style-name="表格8.1">
          <table:table-cell table:style-name="表格8.A3" office:value-type="string">
            <text:p text:style-name="P13">-d</text:p>
          </table:table-cell>
          <table:table-cell table:style-name="表格8.A3" office:value-type="string">
            <text:p text:style-name="P13">directory</text:p>
          </table:table-cell>
          <table:table-cell table:style-name="表格8.A3" office:value-type="string">
            <text:p text:style-name="P13">路徑是否為資料夾（不含一般檔案）</text:p>
          </table:table-cell>
        </table:table-row>
        <table:table-row table:style-name="表格8.1">
          <table:table-cell table:style-name="表格8.A2" office:value-type="string">
            <text:p text:style-name="P13">-f</text:p>
          </table:table-cell>
          <table:table-cell table:style-name="表格8.A2" office:value-type="string">
            <text:p text:style-name="P13">file（補充）</text:p>
          </table:table-cell>
          <table:table-cell table:style-name="表格8.A2" office:value-type="string">
            <text:p text:style-name="P13">路徑是否為一般檔案（不含資料夾）</text:p>
          </table:table-cell>
        </table:table-row>
        <table:table-row table:style-name="表格8.1">
          <table:table-cell table:style-name="表格8.A3" office:value-type="string">
            <text:p text:style-name="P13">-r</text:p>
          </table:table-cell>
          <table:table-cell table:style-name="表格8.A3" office:value-type="string">
            <text:p text:style-name="P13">read</text:p>
          </table:table-cell>
          <table:table-cell table:style-name="表格8.A3" office:value-type="string">
            <text:p text:style-name="P13">目前使用者是否有讀取權限</text:p>
          </table:table-cell>
        </table:table-row>
        <table:table-row table:style-name="表格8.1">
          <table:table-cell table:style-name="表格8.A2" office:value-type="string">
            <text:p text:style-name="P13">-w</text:p>
          </table:table-cell>
          <table:table-cell table:style-name="表格8.A2" office:value-type="string">
            <text:p text:style-name="P13">write</text:p>
          </table:table-cell>
          <table:table-cell table:style-name="表格8.A2" office:value-type="string">
            <text:p text:style-name="P13">目前使用者是否有寫入權限</text:p>
          </table:table-cell>
        </table:table-row>
        <table:table-row table:style-name="表格8.1">
          <table:table-cell table:style-name="表格8.A3" office:value-type="string">
            <text:p text:style-name="P13">-x</text:p>
          </table:table-cell>
          <table:table-cell table:style-name="表格8.A3" office:value-type="string">
            <text:p text:style-name="P13">execute / traverse</text:p>
          </table:table-cell>
          <table:table-cell table:style-name="表格8.A3" office:value-type="string">
            <text:p text:style-name="P13">對資料夾：可否 cd 進入；對檔案：可否執行</text:p>
          </table:table-cell>
        </table:table-row>
        <table:table-row table:style-name="表格8.1">
          <table:table-cell table:style-name="表格8.A2" office:value-type="string">
            <text:p text:style-name="P13">exit 0</text:p>
          </table:table-cell>
          <table:table-cell table:style-name="表格8.A2" office:value-type="string">
            <text:p text:style-name="P13">正常結束</text:p>
          </table:table-cell>
          <table:table-cell table:style-name="表格8.A2" office:value-type="string">
            <text:p text:style-name="P13">程式成功完成，回傳給呼叫者的代碼為 0</text:p>
          </table:table-cell>
        </table:table-row>
        <table:table-row table:style-name="表格8.1">
          <table:table-cell table:style-name="表格8.A3" office:value-type="string">
            <text:p text:style-name="P13">exit 1</text:p>
          </table:table-cell>
          <table:table-cell table:style-name="表格8.A3" office:value-type="string">
            <text:p text:style-name="P13">錯誤結束</text:p>
          </table:table-cell>
          <table:table-cell table:style-name="表格8.A3" office:value-type="string">
            <text:p text:style-name="P13">程式遇到錯誤，回傳代碼 1（可為任意非 0 值）</text:p>
          </table:table-cell>
        </table:table-row>
        <table:table-row table:style-name="表格8.1">
          <table:table-cell table:style-name="表格8.A2" office:value-type="string">
            <text:p text:style-name="P13">$USER</text:p>
          </table:table-cell>
          <table:table-cell table:style-name="表格8.A2" office:value-type="string">
            <text:p text:style-name="P13">使用者名稱</text:p>
          </table:table-cell>
          <table:table-cell table:style-name="表格8.A2" office:value-type="string">
            <text:p text:style-name="P13">shell 自動設定的環境變數，目前登入使用者名稱</text:p>
          </table:table-cell>
        </table:table-row>
        <table:table-row table:style-name="表格8.1">
          <table:table-cell table:style-name="表格8.A3" office:value-type="string">
            <text:p text:style-name="P13">$?</text:p>
          </table:table-cell>
          <table:table-cell table:style-name="表格8.A3" office:value-type="string">
            <text:p text:style-name="P13">上一指令結束碼（補充）</text:p>
          </table:table-cell>
          <table:table-cell table:style-name="表格8.A3" office:value-type="string">
            <text:p text:style-name="P13">取得剛剛執行的指令回傳的 exit code</text:p>
          </table:table-cell>
        </table:table-row>
      </table:table>
      <text:p text:style-name="P3">🎯 一句話總結</text:p>
      <text:p text:style-name="P26">核心觀念</text:p>
      <text:p text:style-name="P29">這支 script 的核心邏輯是「守門員模式（Guard Clause）」：先用兩個 exit 把不合法的輸入擋掉，確認路徑合法後，再逐一報告有哪些權限。這是 shell scripting 最常見、最實用的設計模式之一。</text:p>
      <text:p text:style-name="P27">變數引號、exit 代碼、test / [ ] 的等價寫法、-x 對資料夾的特殊意義，以及 A &amp;&amp; B || C 不等於 if...else——這五個是本篇筆記最需要掌握的關鍵知識點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Microsoft JhengHei" fo:font-size="10.5pt" fo:language="en" fo:country="US" style:letter-kerning="false" style:font-name-asian="Microsoft JhengHei1" style:font-size-asian="10.5pt" style:language-asian="zh" style:country-asian="TW" style:font-name-complex="Microsoft JhengHei1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Microsoft JhengHei" fo:font-size="10.5pt" fo:language="en" fo:country="US" style:letter-kerning="false" style:font-name-asian="Microsoft JhengHei1" style:font-size-asian="10.5pt" style:language-asian="zh" style:country-asian="TW" style:font-name-complex="Microsoft JhengHei1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right" style:justify-single-word="false" fo:padding-left="0cm" fo:padding-right="0cm" fo:padding-top="0cm" fo:padding-bottom="0.141cm" fo:border-left="none" fo:border-right="none" fo:border-top="none" fo:border-bottom="0.74pt solid #d9760a"/>
      <style:text-properties fo:color="#1f3a5f" loext:opacity="100%" style:font-name="Microsoft JhengHei" fo:font-size="8pt" fo:font-style="italic" style:font-name-asian="Microsoft JhengHei1" style:font-size-asian="8pt" style:font-style-asian="italic" style:font-name-complex="Microsoft JhengHei1" style:font-size-complex="8pt" style:font-style-complex="italic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color="#1f3a5f" loext:opacity="100%" style:font-name="Microsoft JhengHei" fo:font-size="8pt" style:font-name-asian="Microsoft JhengHei1" style:font-size-asian="8pt" style:font-name-complex="Microsoft JhengHei1" style:font-size-complex="8pt"/>
    </style:style>
    <style:style style:name="MT2" style:family="text"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hell Script 資料夾權限檢查</text:p>
      </style:header>
      <style:footer>
        <text:p text:style-name="MP2"><text:span text:style-name="MT1">第 </text:span><text:span text:style-name="MT2"><text:page-number text:select-page="current">6</text:page-number></text:span><text:span text:style-name="MT1"><text:s/>頁，共 </text:span><text:span text:style-name="MT2"><text:page-count>6</text:page-count></text:span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1</meta:editing-cycles>
    <meta:creation-date>2026-07-14T06:54:08.934000000</meta:creation-date>
    <dc:date>2026-07-15T22:34:26.074517100</dc:date>
    <meta:editing-duration>P1DT4H1M15S</meta:editing-duration>
    <meta:generator>LibreOffice/26.2.4.2$Windows_X86_64 LibreOffice_project/0229ac93fcf0d7cbc6376066c6f35021cef002dc</meta:generator>
    <meta:document-statistic meta:table-count="8" meta:image-count="0" meta:object-count="0" meta:page-count="6" meta:paragraph-count="227" meta:word-count="3574" meta:character-count="5667" meta:non-whitespace-character-count="5006"/>
  </office:meta>
</office:document-meta>
</file>